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228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0.53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ool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ShaftDiameter</text:p>
          </table:table-cell>
          <table:table-cell office:value-type="string" calcext:value-type="string">
            <text:p>ShaftLength</text:p>
          </table:table-cell>
          <table:table-cell office:value-type="string" calcext:value-type="string">
            <text:p>FluteDiameter</text:p>
          </table:table-cell>
          <table:table-cell office:value-type="string" calcext:value-type="string">
            <text:p>FluteLength</text:p>
          </table:table-cell>
          <table:table-cell office:value-type="string" calcext:value-type="string">
            <text:p>TaperTip</text:p>
          </table:table-cell>
          <table:table-cell office:value-type="string" calcext:value-type="string">
            <text:p>Taper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ll 0.8mm</text:p>
          </table:table-cell>
          <table:table-cell office:value-type="float" office:value="9" calcext:value-type="float">
            <text:p>9</text:p>
          </table:table-cell>
          <table:table-cell office:value-type="float" office:value="1780610382471" calcext:value-type="float">
            <text:p>1780610382471</text:p>
          </table:table-cell>
          <table:table-cell office:value-type="string" calcext:value-type="string">
            <text:p>ballmill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l 1/16</text:p>
          </table:table-cell>
          <table:table-cell office:value-type="float" office:value="8" calcext:value-type="float">
            <text:p>8</text:p>
          </table:table-cell>
          <table:table-cell office:value-type="float" office:value="1780610236405" calcext:value-type="float">
            <text:p>1780610236405</text:p>
          </table:table-cell>
          <table:table-cell office:value-type="string" calcext:value-type="string">
            <text:p>ballmill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l 1/8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ballmill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ll 1mm</text:p>
          </table:table-cell>
          <table:table-cell office:value-type="float" office:value="16" calcext:value-type="float">
            <text:p>16</text:p>
          </table:table-cell>
          <table:table-cell office:value-type="float" office:value="1780949654565" calcext:value-type="float">
            <text:p>1780949654565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l 2mm</text:p>
          </table:table-cell>
          <table:table-cell office:value-type="float" office:value="20" calcext:value-type="float">
            <text:p>20</text:p>
          </table:table-cell>
          <table:table-cell office:value-type="float" office:value="1780949655000" calcext:value-type="float">
            <text:p>1780949655000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l 3mm</text:p>
          </table:table-cell>
          <table:table-cell office:value-type="float" office:value="17" calcext:value-type="float">
            <text:p>17</text:p>
          </table:table-cell>
          <table:table-cell office:value-type="float" office:value="1782413000000" calcext:value-type="float">
            <text:p>1782413000000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ll 3.175mm</text:p>
          </table:table-cell>
          <table:table-cell office:value-type="float" office:value="19" calcext:value-type="float">
            <text:p>19</text:p>
          </table:table-cell>
          <table:table-cell office:value-type="float" office:value="1780700987000" calcext:value-type="float">
            <text:p>1780700987000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office:value-type="float" office:value="50" calcext:value-type="float">
            <text:p>50</text:p>
          </table:table-cell>
          <table:table-cell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ll 4mm</text:p>
          </table:table-cell>
          <table:table-cell office:value-type="float" office:value="10" calcext:value-type="float">
            <text:p>10</text:p>
          </table:table-cell>
          <table:table-cell office:value-type="float" office:value="1780689512654" calcext:value-type="float">
            <text:p>1780689512654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ill 1/4</text:p>
          </table:table-cell>
          <table:table-cell office:value-type="float" office:value="7" calcext:value-type="float">
            <text:p>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drill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ill 1/8</text:p>
          </table:table-cell>
          <table:table-cell office:value-type="float" office:value="6" calcext:value-type="float">
            <text:p>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drill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d 1/16</text:p>
          </table:table-cell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endmill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d 1/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ndmill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d 1/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ndmill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d 1mm</text:p>
          </table:table-cell>
          <table:table-cell office:value-type="float" office:value="12" calcext:value-type="float">
            <text:p>12</text:p>
          </table:table-cell>
          <table:table-cell office:value-type="float" office:value="1780690642469" calcext:value-type="float">
            <text:p>1780690642469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nd 2mm</text:p>
          </table:table-cell>
          <table:table-cell office:value-type="float" office:value="11" calcext:value-type="float">
            <text:p>11</text:p>
          </table:table-cell>
          <table:table-cell office:value-type="float" office:value="1780690475433" calcext:value-type="float">
            <text:p>1780690475433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d 3mm</text:p>
          </table:table-cell>
          <table:table-cell office:value-type="float" office:value="15" calcext:value-type="float">
            <text:p>15</text:p>
          </table:table-cell>
          <table:table-cell office:value-type="float" office:value="1780700986241" calcext:value-type="float">
            <text:p>1780700986241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d 3.175mm</text:p>
          </table:table-cell>
          <table:table-cell office:value-type="float" office:value="18" calcext:value-type="float">
            <text:p>18</text:p>
          </table:table-cell>
          <table:table-cell office:value-type="float" office:value="1780700986500" calcext:value-type="float">
            <text:p>1780700986500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office:value-type="float" office:value="50" calcext:value-type="float">
            <text:p>50</text:p>
          </table:table-cell>
          <table:table-cell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d 4mm</text:p>
          </table:table-cell>
          <table:table-cell office:value-type="float" office:value="13" calcext:value-type="float">
            <text:p>13</text:p>
          </table:table-cell>
          <table:table-cell office:value-type="float" office:value="1780690672742" calcext:value-type="float">
            <text:p>1780690672742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d 6mm</text:p>
          </table:table-cell>
          <table:table-cell office:value-type="float" office:value="14" calcext:value-type="float">
            <text:p>14</text:p>
          </table:table-cell>
          <table:table-cell office:value-type="float" office:value="1780690725110" calcext:value-type="float">
            <text:p>1780690725110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e 1/8</text:p>
          </table:table-cell>
          <table:table-cell office:value-type="float" office:value="4" calcext:value-type="float">
            <text:p>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tapermill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oxelTesting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oxel</text:p>
          </table:table-cell>
          <table:table-cell table:number-columns-repeated="3"/>
          <table:table-cell office:value-type="string" calcext:value-type="string">
            <text:p>Verte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A3]*voxelPrecision" office:value-type="float" office:value="19" calcext:value-type="float">
            <text:p>19</text:p>
          </table:table-cell>
          <table:table-cell table:formula="of:=[.B3]*voxelPrecision" office:value-type="float" office:value="8.5" calcext:value-type="float">
            <text:p>8.5</text:p>
          </table:table-cell>
          <table:table-cell table:formula="of:=[.C3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]*voxelPrecision" office:value-type="float" office:value="19" calcext:value-type="float">
            <text:p>19</text:p>
          </table:table-cell>
          <table:table-cell table:formula="of:=[.B4]*voxelPrecision" office:value-type="float" office:value="8" calcext:value-type="float">
            <text:p>8</text:p>
          </table:table-cell>
          <table:table-cell table:formula="of:=[.C4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]*voxelPrecision" office:value-type="float" office:value="19" calcext:value-type="float">
            <text:p>19</text:p>
          </table:table-cell>
          <table:table-cell table:formula="of:=[.B5]*voxelPrecision" office:value-type="float" office:value="8.5" calcext:value-type="float">
            <text:p>8.5</text:p>
          </table:table-cell>
          <table:table-cell table:formula="of:=[.C5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]*voxelPrecision" office:value-type="float" office:value="19" calcext:value-type="float">
            <text:p>19</text:p>
          </table:table-cell>
          <table:table-cell table:formula="of:=[.B6]*voxelPrecision" office:value-type="float" office:value="9" calcext:value-type="float">
            <text:p>9</text:p>
          </table:table-cell>
          <table:table-cell table:formula="of:=[.C6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]*voxelPrecision" office:value-type="float" office:value="19.5" calcext:value-type="float">
            <text:p>19.5</text:p>
          </table:table-cell>
          <table:table-cell table:formula="of:=[.B7]*voxelPrecision" office:value-type="float" office:value="8.5" calcext:value-type="float">
            <text:p>8.5</text:p>
          </table:table-cell>
          <table:table-cell table:formula="of:=[.C7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]*voxelPrecision" office:value-type="float" office:value="10" calcext:value-type="float">
            <text:p>10</text:p>
          </table:table-cell>
          <table:table-cell table:formula="of:=[.B8]*voxelPrecision" office:value-type="float" office:value="14" calcext:value-type="float">
            <text:p>14</text:p>
          </table:table-cell>
          <table:table-cell table:formula="of:=[.C8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]*voxelPrecision" office:value-type="float" office:value="10.5" calcext:value-type="float">
            <text:p>10.5</text:p>
          </table:table-cell>
          <table:table-cell table:formula="of:=[.B9]*voxelPrecision" office:value-type="float" office:value="14" calcext:value-type="float">
            <text:p>14</text:p>
          </table:table-cell>
          <table:table-cell table:formula="of:=[.C9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*voxelPrecision" office:value-type="float" office:value="11" calcext:value-type="float">
            <text:p>11</text:p>
          </table:table-cell>
          <table:table-cell table:formula="of:=[.B10]*voxelPrecision" office:value-type="float" office:value="14" calcext:value-type="float">
            <text:p>14</text:p>
          </table:table-cell>
          <table:table-cell table:formula="of:=[.C10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]*voxelPrecision" office:value-type="float" office:value="11.5" calcext:value-type="float">
            <text:p>11.5</text:p>
          </table:table-cell>
          <table:table-cell table:formula="of:=[.B11]*voxelPrecision" office:value-type="float" office:value="14" calcext:value-type="float">
            <text:p>14</text:p>
          </table:table-cell>
          <table:table-cell table:formula="of:=[.C11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]*voxelPrecision" office:value-type="float" office:value="12" calcext:value-type="float">
            <text:p>12</text:p>
          </table:table-cell>
          <table:table-cell table:formula="of:=[.B12]*voxelPrecision" office:value-type="float" office:value="13.5" calcext:value-type="float">
            <text:p>13.5</text:p>
          </table:table-cell>
          <table:table-cell table:formula="of:=[.C12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]*voxelPrecision" office:value-type="float" office:value="12.5" calcext:value-type="float">
            <text:p>12.5</text:p>
          </table:table-cell>
          <table:table-cell table:formula="of:=[.B13]*voxelPrecision" office:value-type="float" office:value="13.5" calcext:value-type="float">
            <text:p>13.5</text:p>
          </table:table-cell>
          <table:table-cell table:formula="of:=[.C13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]*voxelPrecision" office:value-type="float" office:value="13" calcext:value-type="float">
            <text:p>13</text:p>
          </table:table-cell>
          <table:table-cell table:formula="of:=[.B14]*voxelPrecision" office:value-type="float" office:value="13.5" calcext:value-type="float">
            <text:p>13.5</text:p>
          </table:table-cell>
          <table:table-cell table:formula="of:=[.C14]*voxelPrecision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]*voxelPrecision" office:value-type="float" office:value="13.5" calcext:value-type="float">
            <text:p>13.5</text:p>
          </table:table-cell>
          <table:table-cell table:formula="of:=[.B15]*voxelPrecision" office:value-type="float" office:value="13.5" calcext:value-type="float">
            <text:p>13.5</text:p>
          </table:table-cell>
          <table:table-cell table:formula="of:=[.C15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]*voxelPrecision" office:value-type="float" office:value="14" calcext:value-type="float">
            <text:p>14</text:p>
          </table:table-cell>
          <table:table-cell table:formula="of:=[.B16]*voxelPrecision" office:value-type="float" office:value="13" calcext:value-type="float">
            <text:p>13</text:p>
          </table:table-cell>
          <table:table-cell table:formula="of:=[.C16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]*voxelPrecision" office:value-type="float" office:value="14.5" calcext:value-type="float">
            <text:p>14.5</text:p>
          </table:table-cell>
          <table:table-cell table:formula="of:=[.B17]*voxelPrecision" office:value-type="float" office:value="13" calcext:value-type="float">
            <text:p>13</text:p>
          </table:table-cell>
          <table:table-cell table:formula="of:=[.C17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]*voxelPrecision" office:value-type="float" office:value="15" calcext:value-type="float">
            <text:p>15</text:p>
          </table:table-cell>
          <table:table-cell table:formula="of:=[.B18]*voxelPrecision" office:value-type="float" office:value="13" calcext:value-type="float">
            <text:p>13</text:p>
          </table:table-cell>
          <table:table-cell table:formula="of:=[.C18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]*voxelPrecision" office:value-type="float" office:value="15.5" calcext:value-type="float">
            <text:p>15.5</text:p>
          </table:table-cell>
          <table:table-cell table:formula="of:=[.B19]*voxelPrecision" office:value-type="float" office:value="13" calcext:value-type="float">
            <text:p>13</text:p>
          </table:table-cell>
          <table:table-cell table:formula="of:=[.C19]*voxelPrecision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]*voxelPrecision" office:value-type="float" office:value="16" calcext:value-type="float">
            <text:p>16</text:p>
          </table:table-cell>
          <table:table-cell table:formula="of:=[.B20]*voxelPrecision" office:value-type="float" office:value="12.5" calcext:value-type="float">
            <text:p>12.5</text:p>
          </table:table-cell>
          <table:table-cell table:formula="of:=[.C20]*voxelPrecision" office:value-type="float" office:value="0" calcext:value-type="float">
            <text:p>0</text:p>
          </table:table-cell>
        </table:table-row>
      </table:table>
      <table:table table:name="Work" table:style-name="ta1">
        <office:forms form:automatic-focus="false" form:apply-design-mode="false"/>
        <table:table-column table:style-name="co2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3D</text:p>
          </table:table-cell>
          <table:table-cell table:number-columns-repeated="3"/>
          <table:table-cell office:value-type="string" calcext:value-type="string">
            <text:p>2D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SUM([.G3:.G127])" office:value-type="float" office:value="33" calcext:value-type="float">
            <text:p>33</text:p>
          </table:table-cell>
          <table:table-cell table:number-columns-repeated="3"/>
          <table:table-cell table:formula="of:=SUM([.K3:.K27])"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/>
          <table:table-cell table:formula="of:=([.A3]*[.A3])+([.B3]*[.B3])+([.C3]*[.C3])" office:value-type="float" office:value="12" calcext:value-type="float">
            <text:p>12</text:p>
          </table:table-cell>
          <table:table-cell table:formula="of:=2*2" office:value-type="float" office:value="4" calcext:value-type="float">
            <text:p>4</text:p>
          </table:table-cell>
          <table:table-cell table:formula="of:=IF([.E3]&lt;=[.F3];1;0)" office:value-type="float" office:value="0" calcext:value-type="float">
            <text:p>0</text:p>
          </table:table-cell>
          <table:table-cell/>
          <table:table-cell table:formula="of:=([.A3]*[.A3])+([.B3]*[.B3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3]&lt;=[.J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formula="of:=([.A4]*[.A4])+([.B4]*[.B4])+([.C4]*[.C4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4]&lt;=[.F4];1;0)" office:value-type="float" office:value="0" calcext:value-type="float">
            <text:p>0</text:p>
          </table:table-cell>
          <table:table-cell/>
          <table:table-cell table:formula="of:=([.A4]*[.A4])+([.B4]*[.B4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4]&lt;=[.J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formula="of:=([.A5]*[.A5])+([.B5]*[.B5])+([.C5]*[.C5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5]&lt;=[.F5];1;0)" office:value-type="float" office:value="0" calcext:value-type="float">
            <text:p>0</text:p>
          </table:table-cell>
          <table:table-cell/>
          <table:table-cell table:formula="of:=([.A5]*[.A5])+([.B5]*[.B5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5]&lt;=[.J5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formula="of:=([.A6]*[.A6])+([.B6]*[.B6])+([.C6]*[.C6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6]&lt;=[.F6];1;0)" office:value-type="float" office:value="0" calcext:value-type="float">
            <text:p>0</text:p>
          </table:table-cell>
          <table:table-cell/>
          <table:table-cell table:formula="of:=([.A6]*[.A6])+([.B6]*[.B6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6]&lt;=[.J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formula="of:=([.A7]*[.A7])+([.B7]*[.B7])+([.C7]*[.C7])" office:value-type="float" office:value="12" calcext:value-type="float">
            <text:p>12</text:p>
          </table:table-cell>
          <table:table-cell table:formula="of:=2*2" office:value-type="float" office:value="4" calcext:value-type="float">
            <text:p>4</text:p>
          </table:table-cell>
          <table:table-cell table:formula="of:=IF([.E7]&lt;=[.F7];1;0)" office:value-type="float" office:value="0" calcext:value-type="float">
            <text:p>0</text:p>
          </table:table-cell>
          <table:table-cell/>
          <table:table-cell table:formula="of:=([.A7]*[.A7])+([.B7]*[.B7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7]&lt;=[.J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8]*[.A8])+([.B8]*[.B8])+([.C8]*[.C8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8]&lt;=[.F8];1;0)" office:value-type="float" office:value="0" calcext:value-type="float">
            <text:p>0</text:p>
          </table:table-cell>
          <table:table-cell/>
          <table:table-cell table:formula="of:=([.A8]*[.A8])+([.B8]*[.B8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8]&lt;=[.J8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9]*[.A9])+([.B9]*[.B9])+([.C9]*[.C9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9]&lt;=[.F9];1;0)" office:value-type="float" office:value="0" calcext:value-type="float">
            <text:p>0</text:p>
          </table:table-cell>
          <table:table-cell/>
          <table:table-cell table:formula="of:=([.A9]*[.A9])+([.B9]*[.B9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9]&lt;=[.J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0]*[.A10])+([.B10]*[.B10])+([.C10]*[.C10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10]&lt;=[.F10];1;0)" office:value-type="float" office:value="0" calcext:value-type="float">
            <text:p>0</text:p>
          </table:table-cell>
          <table:table-cell/>
          <table:table-cell table:formula="of:=([.A10]*[.A10])+([.B10]*[.B10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0]&lt;=[.J10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1]*[.A11])+([.B11]*[.B11])+([.C11]*[.C11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11]&lt;=[.F11];1;0)" office:value-type="float" office:value="0" calcext:value-type="float">
            <text:p>0</text:p>
          </table:table-cell>
          <table:table-cell/>
          <table:table-cell table:formula="of:=([.A11]*[.A11])+([.B11]*[.B11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1]&lt;=[.J11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2]*[.A12])+([.B12]*[.B12])+([.C12]*[.C12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2]&lt;=[.F12];1;0)" office:value-type="float" office:value="0" calcext:value-type="float">
            <text:p>0</text:p>
          </table:table-cell>
          <table:table-cell/>
          <table:table-cell table:formula="of:=([.A12]*[.A12])+([.B12]*[.B12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2]&lt;=[.J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3]*[.A13])+([.B13]*[.B13])+([.C13]*[.C13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13]&lt;=[.F13];1;0)" office:value-type="float" office:value="0" calcext:value-type="float">
            <text:p>0</text:p>
          </table:table-cell>
          <table:table-cell/>
          <table:table-cell table:formula="of:=([.A13]*[.A13])+([.B13]*[.B13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3]&lt;=[.J13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4]*[.A14])+([.B14]*[.B14])+([.C14]*[.C14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14]&lt;=[.F14];1;0)" office:value-type="float" office:value="0" calcext:value-type="float">
            <text:p>0</text:p>
          </table:table-cell>
          <table:table-cell/>
          <table:table-cell table:formula="of:=([.A14]*[.A14])+([.B14]*[.B14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4]&lt;=[.J14];1;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5]*[.A15])+([.B15]*[.B15])+([.C15]*[.C15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formula="of:=IF([.E15]&lt;=[.F15];1;0)" office:value-type="float" office:value="1" calcext:value-type="float">
            <text:p>1</text:p>
          </table:table-cell>
          <table:table-cell/>
          <table:table-cell table:formula="of:=([.A15]*[.A15])+([.B15]*[.B15])" office:value-type="float" office:value="0" calcext:value-type="float">
            <text:p>0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5]&lt;=[.J15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6]*[.A16])+([.B16]*[.B16])+([.C16]*[.C16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16]&lt;=[.F16];1;0)" office:value-type="float" office:value="0" calcext:value-type="float">
            <text:p>0</text:p>
          </table:table-cell>
          <table:table-cell/>
          <table:table-cell table:formula="of:=([.A16]*[.A16])+([.B16]*[.B16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6]&lt;=[.J16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7]*[.A17])+([.B17]*[.B17])+([.C17]*[.C17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17]&lt;=[.F17];1;0)" office:value-type="float" office:value="0" calcext:value-type="float">
            <text:p>0</text:p>
          </table:table-cell>
          <table:table-cell/>
          <table:table-cell table:formula="of:=([.A17]*[.A17])+([.B17]*[.B17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7]&lt;=[.J17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8]*[.A18])+([.B18]*[.B18])+([.C18]*[.C18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8]&lt;=[.F18];1;0)" office:value-type="float" office:value="0" calcext:value-type="float">
            <text:p>0</text:p>
          </table:table-cell>
          <table:table-cell/>
          <table:table-cell table:formula="of:=([.A18]*[.A18])+([.B18]*[.B18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8]&lt;=[.J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9]*[.A19])+([.B19]*[.B19])+([.C19]*[.C19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19]&lt;=[.F19];1;0)" office:value-type="float" office:value="0" calcext:value-type="float">
            <text:p>0</text:p>
          </table:table-cell>
          <table:table-cell/>
          <table:table-cell table:formula="of:=([.A19]*[.A19])+([.B19]*[.B19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19]&lt;=[.J1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0]*[.A20])+([.B20]*[.B20])+([.C20]*[.C20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20]&lt;=[.F20];1;0)" office:value-type="float" office:value="0" calcext:value-type="float">
            <text:p>0</text:p>
          </table:table-cell>
          <table:table-cell/>
          <table:table-cell table:formula="of:=([.A20]*[.A20])+([.B20]*[.B20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20]&lt;=[.J20];1;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1]*[.A21])+([.B21]*[.B21])+([.C21]*[.C21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21]&lt;=[.F21];1;0)" office:value-type="float" office:value="0" calcext:value-type="float">
            <text:p>0</text:p>
          </table:table-cell>
          <table:table-cell/>
          <table:table-cell table:formula="of:=([.A21]*[.A21])+([.B21]*[.B21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21]&lt;=[.J21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2]*[.A22])+([.B22]*[.B22])+([.C22]*[.C22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22]&lt;=[.F22];1;0)" office:value-type="float" office:value="0" calcext:value-type="float">
            <text:p>0</text:p>
          </table:table-cell>
          <table:table-cell/>
          <table:table-cell table:formula="of:=([.A22]*[.A22])+([.B22]*[.B22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22]&lt;=[.J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3]*[.A23])+([.B23]*[.B23])+([.C23]*[.C23])" office:value-type="float" office:value="12" calcext:value-type="float">
            <text:p>12</text:p>
          </table:table-cell>
          <table:table-cell table:formula="of:=2*2" office:value-type="float" office:value="4" calcext:value-type="float">
            <text:p>4</text:p>
          </table:table-cell>
          <table:table-cell table:formula="of:=IF([.E23]&lt;=[.F23];1;0)" office:value-type="float" office:value="0" calcext:value-type="float">
            <text:p>0</text:p>
          </table:table-cell>
          <table:table-cell/>
          <table:table-cell table:formula="of:=([.A23]*[.A23])+([.B23]*[.B23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23]&lt;=[.J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4]*[.A24])+([.B24]*[.B24])+([.C24]*[.C24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24]&lt;=[.F24];1;0)" office:value-type="float" office:value="0" calcext:value-type="float">
            <text:p>0</text:p>
          </table:table-cell>
          <table:table-cell/>
          <table:table-cell table:formula="of:=([.A24]*[.A24])+([.B24]*[.B24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24]&lt;=[.J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5]*[.A25])+([.B25]*[.B25])+([.C25]*[.C25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25]&lt;=[.F25];1;0)" office:value-type="float" office:value="0" calcext:value-type="float">
            <text:p>0</text:p>
          </table:table-cell>
          <table:table-cell/>
          <table:table-cell table:formula="of:=([.A25]*[.A25])+([.B25]*[.B25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25]&lt;=[.J25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6]*[.A26])+([.B26]*[.B26])+([.C26]*[.C26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26]&lt;=[.F26];1;0)" office:value-type="float" office:value="0" calcext:value-type="float">
            <text:p>0</text:p>
          </table:table-cell>
          <table:table-cell/>
          <table:table-cell table:formula="of:=([.A26]*[.A26])+([.B26]*[.B26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26]&lt;=[.J26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7]*[.A27])+([.B27]*[.B27])+([.C27]*[.C27])" office:value-type="float" office:value="12" calcext:value-type="float">
            <text:p>12</text:p>
          </table:table-cell>
          <table:table-cell table:formula="of:=2*2" office:value-type="float" office:value="4" calcext:value-type="float">
            <text:p>4</text:p>
          </table:table-cell>
          <table:table-cell table:formula="of:=IF([.E27]&lt;=[.F27];1;0)" office:value-type="float" office:value="0" calcext:value-type="float">
            <text:p>0</text:p>
          </table:table-cell>
          <table:table-cell/>
          <table:table-cell table:formula="of:=([.A27]*[.A27])+([.B27]*[.B27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style-name="ce1" table:formula="of:=IF([.I27]&lt;=[.J27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28]*[.A28])+([.B28]*[.B28])+([.C28]*[.C28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28]&lt;=[.F2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29]*[.A29])+([.B29]*[.B29])+([.C29]*[.C29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29]&lt;=[.F2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0]*[.A30])+([.B30]*[.B30])+([.C30]*[.C30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30]&lt;=[.F3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1]*[.A31])+([.B31]*[.B31])+([.C31]*[.C31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31]&lt;=[.F31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2]*[.A32])+([.B32]*[.B32])+([.C32]*[.C32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32]&lt;=[.F3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([.A33]*[.A33])+([.B33]*[.B33])+([.C33]*[.C33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33]&lt;=[.F3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/>
          <table:table-cell table:formula="of:=([.A34]*[.A34])+([.B34]*[.B34])+([.C34]*[.C34])" office:value-type="float" office:value="3" calcext:value-type="float">
            <text:p>3</text:p>
          </table:table-cell>
          <table:table-cell table:formula="of:=2*2" office:value-type="float" office:value="4" calcext:value-type="float">
            <text:p>4</text:p>
          </table:table-cell>
          <table:table-cell table:formula="of:=IF([.E34]&lt;=[.F3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([.A35]*[.A35])+([.B35]*[.B35])+([.C35]*[.C35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35]&lt;=[.F3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([.A36]*[.A36])+([.B36]*[.B36])+([.C36]*[.C36])" office:value-type="float" office:value="3" calcext:value-type="float">
            <text:p>3</text:p>
          </table:table-cell>
          <table:table-cell table:formula="of:=2*2" office:value-type="float" office:value="4" calcext:value-type="float">
            <text:p>4</text:p>
          </table:table-cell>
          <table:table-cell table:formula="of:=IF([.E36]&lt;=[.F3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([.A37]*[.A37])+([.B37]*[.B37])+([.C37]*[.C37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37]&lt;=[.F3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8]*[.A38])+([.B38]*[.B38])+([.C38]*[.C38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38]&lt;=[.F3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9]*[.A39])+([.B39]*[.B39])+([.C39]*[.C39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39]&lt;=[.F3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0]*[.A40])+([.B40]*[.B40])+([.C40]*[.C40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formula="of:=IF([.E40]&lt;=[.F40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1]*[.A41])+([.B41]*[.B41])+([.C41]*[.C41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41]&lt;=[.F4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2]*[.A42])+([.B42]*[.B42])+([.C42]*[.C42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42]&lt;=[.F4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3]*[.A43])+([.B43]*[.B43])+([.C43]*[.C43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43]&lt;=[.F4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4]*[.A44])+([.B44]*[.B44])+([.C44]*[.C44])" office:value-type="float" office:value="3" calcext:value-type="float">
            <text:p>3</text:p>
          </table:table-cell>
          <table:table-cell table:formula="of:=2*2" office:value-type="float" office:value="4" calcext:value-type="float">
            <text:p>4</text:p>
          </table:table-cell>
          <table:table-cell table:formula="of:=IF([.E44]&lt;=[.F4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5]*[.A45])+([.B45]*[.B45])+([.C45]*[.C45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45]&lt;=[.F4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6]*[.A46])+([.B46]*[.B46])+([.C46]*[.C46])" office:value-type="float" office:value="3" calcext:value-type="float">
            <text:p>3</text:p>
          </table:table-cell>
          <table:table-cell table:formula="of:=2*2" office:value-type="float" office:value="4" calcext:value-type="float">
            <text:p>4</text:p>
          </table:table-cell>
          <table:table-cell table:formula="of:=IF([.E46]&lt;=[.F4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7]*[.A47])+([.B47]*[.B47])+([.C47]*[.C47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47]&lt;=[.F4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8]*[.A48])+([.B48]*[.B48])+([.C48]*[.C48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48]&lt;=[.F4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49]*[.A49])+([.B49]*[.B49])+([.C49]*[.C49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49]&lt;=[.F4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50]*[.A50])+([.B50]*[.B50])+([.C50]*[.C50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50]&lt;=[.F5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51]*[.A51])+([.B51]*[.B51])+([.C51]*[.C51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51]&lt;=[.F51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52]*[.A52])+([.B52]*[.B52])+([.C52]*[.C52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52]&lt;=[.F5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3]*[.A53])+([.B53]*[.B53])+([.C53]*[.C53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53]&lt;=[.F5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4]*[.A54])+([.B54]*[.B54])+([.C54]*[.C54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54]&lt;=[.F54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5]*[.A55])+([.B55]*[.B55])+([.C55]*[.C55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formula="of:=IF([.E55]&lt;=[.F5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6]*[.A56])+([.B56]*[.B56])+([.C56]*[.C56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56]&lt;=[.F5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7]*[.A57])+([.B57]*[.B57])+([.C57]*[.C57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57]&lt;=[.F5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8]*[.A58])+([.B58]*[.B58])+([.C58]*[.C58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58]&lt;=[.F5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9]*[.A59])+([.B59]*[.B59])+([.C59]*[.C59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59]&lt;=[.F5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0]*[.A60])+([.B60]*[.B60])+([.C60]*[.C60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formula="of:=IF([.E60]&lt;=[.F60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1]*[.A61])+([.B61]*[.B61])+([.C61]*[.C61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61]&lt;=[.F6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2]*[.A62])+([.B62]*[.B62])+([.C62]*[.C62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62]&lt;=[.F6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63]*[.A63])+([.B63]*[.B63])+([.C63]*[.C63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formula="of:=IF([.E63]&lt;=[.F63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64]*[.A64])+([.B64]*[.B64])+([.C64]*[.C64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formula="of:=IF([.E64]&lt;=[.F6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([.A65]*[.A65])+([.B65]*[.B65])+([.C65]*[.C65])" office:value-type="float" office:value="0" calcext:value-type="float">
            <text:p>0</text:p>
          </table:table-cell>
          <table:table-cell table:formula="of:=2*2" office:value-type="float" office:value="4" calcext:value-type="float">
            <text:p>4</text:p>
          </table:table-cell>
          <table:table-cell table:formula="of:=IF([.E65]&lt;=[.F6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66]*[.A66])+([.B66]*[.B66])+([.C66]*[.C66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formula="of:=IF([.E66]&lt;=[.F6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67]*[.A67])+([.B67]*[.B67])+([.C67]*[.C67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formula="of:=IF([.E67]&lt;=[.F67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8]*[.A68])+([.B68]*[.B68])+([.C68]*[.C68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68]&lt;=[.F6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9]*[.A69])+([.B69]*[.B69])+([.C69]*[.C69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69]&lt;=[.F6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0]*[.A70])+([.B70]*[.B70])+([.C70]*[.C70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formula="of:=IF([.E70]&lt;=[.F70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1]*[.A71])+([.B71]*[.B71])+([.C71]*[.C71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71]&lt;=[.F7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2]*[.A72])+([.B72]*[.B72])+([.C72]*[.C72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72]&lt;=[.F7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3]*[.A73])+([.B73]*[.B73])+([.C73]*[.C73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73]&lt;=[.F7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4]*[.A74])+([.B74]*[.B74])+([.C74]*[.C74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74]&lt;=[.F74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5]*[.A75])+([.B75]*[.B75])+([.C75]*[.C75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formula="of:=IF([.E75]&lt;=[.F7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6]*[.A76])+([.B76]*[.B76])+([.C76]*[.C76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76]&lt;=[.F7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7]*[.A77])+([.B77]*[.B77])+([.C77]*[.C77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77]&lt;=[.F7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8]*[.A78])+([.B78]*[.B78])+([.C78]*[.C78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78]&lt;=[.F7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9]*[.A79])+([.B79]*[.B79])+([.C79]*[.C79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79]&lt;=[.F7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0]*[.A80])+([.B80]*[.B80])+([.C80]*[.C80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80]&lt;=[.F8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1]*[.A81])+([.B81]*[.B81])+([.C81]*[.C81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81]&lt;=[.F81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2]*[.A82])+([.B82]*[.B82])+([.C82]*[.C82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82]&lt;=[.F8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3]*[.A83])+([.B83]*[.B83])+([.C83]*[.C83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83]&lt;=[.F8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4]*[.A84])+([.B84]*[.B84])+([.C84]*[.C84])" office:value-type="float" office:value="3" calcext:value-type="float">
            <text:p>3</text:p>
          </table:table-cell>
          <table:table-cell table:formula="of:=2*2" office:value-type="float" office:value="4" calcext:value-type="float">
            <text:p>4</text:p>
          </table:table-cell>
          <table:table-cell table:formula="of:=IF([.E84]&lt;=[.F8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5]*[.A85])+([.B85]*[.B85])+([.C85]*[.C85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85]&lt;=[.F8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6]*[.A86])+([.B86]*[.B86])+([.C86]*[.C86])" office:value-type="float" office:value="3" calcext:value-type="float">
            <text:p>3</text:p>
          </table:table-cell>
          <table:table-cell table:formula="of:=2*2" office:value-type="float" office:value="4" calcext:value-type="float">
            <text:p>4</text:p>
          </table:table-cell>
          <table:table-cell table:formula="of:=IF([.E86]&lt;=[.F8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7]*[.A87])+([.B87]*[.B87])+([.C87]*[.C87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87]&lt;=[.F8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8]*[.A88])+([.B88]*[.B88])+([.C88]*[.C88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88]&lt;=[.F8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9]*[.A89])+([.B89]*[.B89])+([.C89]*[.C89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89]&lt;=[.F8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0]*[.A90])+([.B90]*[.B90])+([.C90]*[.C90])" office:value-type="float" office:value="1" calcext:value-type="float">
            <text:p>1</text:p>
          </table:table-cell>
          <table:table-cell table:formula="of:=2*2" office:value-type="float" office:value="4" calcext:value-type="float">
            <text:p>4</text:p>
          </table:table-cell>
          <table:table-cell table:formula="of:=IF([.E90]&lt;=[.F90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1]*[.A91])+([.B91]*[.B91])+([.C91]*[.C91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91]&lt;=[.F9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2]*[.A92])+([.B92]*[.B92])+([.C92]*[.C92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92]&lt;=[.F9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A93]*[.A93])+([.B93]*[.B93])+([.C93]*[.C93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93]&lt;=[.F9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A94]*[.A94])+([.B94]*[.B94])+([.C94]*[.C94])" office:value-type="float" office:value="3" calcext:value-type="float">
            <text:p>3</text:p>
          </table:table-cell>
          <table:table-cell table:formula="of:=2*2" office:value-type="float" office:value="4" calcext:value-type="float">
            <text:p>4</text:p>
          </table:table-cell>
          <table:table-cell table:formula="of:=IF([.E94]&lt;=[.F9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A95]*[.A95])+([.B95]*[.B95])+([.C95]*[.C95])"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IF([.E95]&lt;=[.F9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([.A96]*[.A96])+([.B96]*[.B96])+([.C96]*[.C96])" office:value-type="float" office:value="3" calcext:value-type="float">
            <text:p>3</text:p>
          </table:table-cell>
          <table:table-cell table:formula="of:=2*2" office:value-type="float" office:value="4" calcext:value-type="float">
            <text:p>4</text:p>
          </table:table-cell>
          <table:table-cell table:formula="of:=IF([.E96]&lt;=[.F9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A97]*[.A97])+([.B97]*[.B97])+([.C97]*[.C97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97]&lt;=[.F9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8]*[.A98])+([.B98]*[.B98])+([.C98]*[.C98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98]&lt;=[.F9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9]*[.A99])+([.B99]*[.B99])+([.C99]*[.C99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99]&lt;=[.F9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00]*[.A100])+([.B100]*[.B100])+([.C100]*[.C100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100]&lt;=[.F10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01]*[.A101])+([.B101]*[.B101])+([.C101]*[.C101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101]&lt;=[.F101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02]*[.A102])+([.B102]*[.B102])+([.C102]*[.C102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02]&lt;=[.F10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03]*[.A103])+([.B103]*[.B103])+([.C103]*[.C103])" office:value-type="float" office:value="12" calcext:value-type="float">
            <text:p>12</text:p>
          </table:table-cell>
          <table:table-cell table:formula="of:=2*2" office:value-type="float" office:value="4" calcext:value-type="float">
            <text:p>4</text:p>
          </table:table-cell>
          <table:table-cell table:formula="of:=IF([.E103]&lt;=[.F10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04]*[.A104])+([.B104]*[.B104])+([.C104]*[.C104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04]&lt;=[.F104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05]*[.A105])+([.B105]*[.B105])+([.C105]*[.C105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105]&lt;=[.F105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06]*[.A106])+([.B106]*[.B106])+([.C106]*[.C106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06]&lt;=[.F10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07]*[.A107])+([.B107]*[.B107])+([.C107]*[.C107])" office:value-type="float" office:value="12" calcext:value-type="float">
            <text:p>12</text:p>
          </table:table-cell>
          <table:table-cell table:formula="of:=2*2" office:value-type="float" office:value="4" calcext:value-type="float">
            <text:p>4</text:p>
          </table:table-cell>
          <table:table-cell table:formula="of:=IF([.E107]&lt;=[.F10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08]*[.A108])+([.B108]*[.B108])+([.C108]*[.C108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08]&lt;=[.F10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09]*[.A109])+([.B109]*[.B109])+([.C109]*[.C109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109]&lt;=[.F10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0]*[.A110])+([.B110]*[.B110])+([.C110]*[.C110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110]&lt;=[.F11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1]*[.A111])+([.B111]*[.B111])+([.C111]*[.C111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111]&lt;=[.F111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2]*[.A112])+([.B112]*[.B112])+([.C112]*[.C112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12]&lt;=[.F11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3]*[.A113])+([.B113]*[.B113])+([.C113]*[.C113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113]&lt;=[.F11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4]*[.A114])+([.B114]*[.B114])+([.C114]*[.C114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114]&lt;=[.F114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5]*[.A115])+([.B115]*[.B115])+([.C115]*[.C115])" office:value-type="float" office:value="4" calcext:value-type="float">
            <text:p>4</text:p>
          </table:table-cell>
          <table:table-cell table:formula="of:=2*2" office:value-type="float" office:value="4" calcext:value-type="float">
            <text:p>4</text:p>
          </table:table-cell>
          <table:table-cell table:formula="of:=IF([.E115]&lt;=[.F11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6]*[.A116])+([.B116]*[.B116])+([.C116]*[.C116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116]&lt;=[.F11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7]*[.A117])+([.B117]*[.B117])+([.C117]*[.C117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117]&lt;=[.F11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8]*[.A118])+([.B118]*[.B118])+([.C118]*[.C118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18]&lt;=[.F11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9]*[.A119])+([.B119]*[.B119])+([.C119]*[.C119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119]&lt;=[.F11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20]*[.A120])+([.B120]*[.B120])+([.C120]*[.C120])" office:value-type="float" office:value="5" calcext:value-type="float">
            <text:p>5</text:p>
          </table:table-cell>
          <table:table-cell table:formula="of:=2*2" office:value-type="float" office:value="4" calcext:value-type="float">
            <text:p>4</text:p>
          </table:table-cell>
          <table:table-cell table:formula="of:=IF([.E120]&lt;=[.F12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21]*[.A121])+([.B121]*[.B121])+([.C121]*[.C121])" office:value-type="float" office:value="6" calcext:value-type="float">
            <text:p>6</text:p>
          </table:table-cell>
          <table:table-cell table:formula="of:=2*2" office:value-type="float" office:value="4" calcext:value-type="float">
            <text:p>4</text:p>
          </table:table-cell>
          <table:table-cell table:formula="of:=IF([.E121]&lt;=[.F121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22]*[.A122])+([.B122]*[.B122])+([.C122]*[.C122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22]&lt;=[.F12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A123]*[.A123])+([.B123]*[.B123])+([.C123]*[.C123])" office:value-type="float" office:value="12" calcext:value-type="float">
            <text:p>12</text:p>
          </table:table-cell>
          <table:table-cell table:formula="of:=2*2" office:value-type="float" office:value="4" calcext:value-type="float">
            <text:p>4</text:p>
          </table:table-cell>
          <table:table-cell table:formula="of:=IF([.E123]&lt;=[.F12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A124]*[.A124])+([.B124]*[.B124])+([.C124]*[.C124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24]&lt;=[.F124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A125]*[.A125])+([.B125]*[.B125])+([.C125]*[.C125])" office:value-type="float" office:value="8" calcext:value-type="float">
            <text:p>8</text:p>
          </table:table-cell>
          <table:table-cell table:formula="of:=2*2" office:value-type="float" office:value="4" calcext:value-type="float">
            <text:p>4</text:p>
          </table:table-cell>
          <table:table-cell table:formula="of:=IF([.E125]&lt;=[.F125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A126]*[.A126])+([.B126]*[.B126])+([.C126]*[.C126])" office:value-type="float" office:value="9" calcext:value-type="float">
            <text:p>9</text:p>
          </table:table-cell>
          <table:table-cell table:formula="of:=2*2" office:value-type="float" office:value="4" calcext:value-type="float">
            <text:p>4</text:p>
          </table:table-cell>
          <table:table-cell table:formula="of:=IF([.E126]&lt;=[.F12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formula="of:=([.A127]*[.A127])+([.B127]*[.B127])+([.C127]*[.C127])" office:value-type="float" office:value="12" calcext:value-type="float">
            <text:p>12</text:p>
          </table:table-cell>
          <table:table-cell table:formula="of:=2*2" office:value-type="float" office:value="4" calcext:value-type="float">
            <text:p>4</text:p>
          </table:table-cell>
          <table:table-cell table:formula="of:=IF([.E127]&lt;=[.F127];1;0)" office:value-type="float" office:value="0" calcext:value-type="float">
            <text:p>0</text:p>
          </table:table-cell>
          <table:table-cell table:number-columns-repeated="4"/>
        </table:table-row>
      </table:table>
      <table:named-expressions>
        <table:named-range table:name="voxelPrecision" table:base-cell-address="$VoxelTesting.$D$3" table:cell-range-address="$VoxelTesting.$D$3"/>
      </table:named-expressions>
      <table:database-ranges>
        <table:database-range table:name="__Anonymous_Sheet_DB__0" table:target-range-address="ToolList.A1:ToolList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2:58:23.34112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12:37:36.104150400</meta:creation-date>
    <dc:title>MyCalcTemplate</dc:title>
    <meta:editing-duration>PT1H33M53S</meta:editing-duration>
    <meta:editing-cycles>7</meta:editing-cycles>
    <meta:generator>LibreOffice/26.2.1.2$Windows_X86_64 LibreOffice_project/620$Build-2</meta:generator>
    <meta:initial-creator>Daniel Patterson, MCSD</meta:initial-creator>
    <dc:date>2026-07-01T14:51:25.780378000</dc:date>
    <dc:creator>Daniel Patterson, MCSD</dc:creator>
    <meta:document-statistic meta:table-count="3" meta:cell-count="1199" meta:object-count="0"/>
    <meta:template xlink:type="simple" xlink:actuate="onRequest" xlink:title="MyCalcTemplate" xlink:href="../../../../../../../Users/Daniel/AppData/Roaming/LibreOffice/4/user/template/MyCalcTemplate.ots" meta:date="2026-06-28T12:37:35.724228500"/>
  </office:meta>
</office:document-meta>
</file>