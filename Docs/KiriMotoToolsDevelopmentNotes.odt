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6626ce" officeooo:paragraph-rsid="006626ce"/>
    </style:style>
    <style:style style:name="P3" style:family="paragraph" style:parent-style-name="Standard">
      <style:text-properties officeooo:rsid="006790b0" officeooo:paragraph-rsid="006790b0"/>
    </style:style>
    <style:style style:name="P4" style:family="paragraph" style:parent-style-name="Normal">
      <style:text-properties officeooo:rsid="006790b0" officeooo:paragraph-rsid="006790b0"/>
    </style:style>
    <style:style style:name="P5" style:family="paragraph" style:parent-style-name="Standard" style:list-style-name="L1">
      <style:text-properties officeooo:rsid="006a132a" officeooo:paragraph-rsid="006a132a"/>
    </style:style>
    <style:style style:name="P6" style:family="paragraph" style:parent-style-name="Standard" style:list-style-name="L1">
      <style:text-properties officeooo:rsid="006790b0" officeooo:paragraph-rsid="006790b0"/>
    </style:style>
    <style:style style:name="P7" style:family="paragraph" style:parent-style-name="Standard">
      <style:text-properties officeooo:rsid="006a132a" officeooo:paragraph-rsid="006a132a"/>
    </style:style>
    <style:style style:name="P8" style:family="paragraph" style:parent-style-name="Standard">
      <style:text-properties officeooo:rsid="0066cca7" officeooo:paragraph-rsid="0066cca7"/>
    </style:style>
    <style:style style:name="P9" style:family="paragraph" style:parent-style-name="Standard" style:list-style-name="L2">
      <style:text-properties officeooo:rsid="0066cca7" officeooo:paragraph-rsid="006c82b6"/>
    </style:style>
    <style:style style:name="P10" style:family="paragraph" style:parent-style-name="Standard" style:list-style-name="L2">
      <style:text-properties officeooo:rsid="006c0bb1" officeooo:paragraph-rsid="006c82b6"/>
    </style:style>
    <style:style style:name="P11" style:family="paragraph" style:parent-style-name="Standard" style:list-style-name="L2">
      <style:text-properties officeooo:rsid="006c82b6" officeooo:paragraph-rsid="006c82b6"/>
    </style:style>
    <style:style style:name="P12" style:family="paragraph" style:parent-style-name="Standard">
      <style:paragraph-properties fo:margin-left="0.5in" fo:text-indent="0in" style:auto-text-indent="false"/>
      <style:text-properties officeooo:rsid="0066cca7" officeooo:paragraph-rsid="0066cca7"/>
    </style:style>
    <style:style style:name="P13" style:family="paragraph" style:parent-style-name="Standard">
      <style:paragraph-properties fo:margin-left="0.5in" fo:text-indent="0in" style:auto-text-indent="false" style:writing-mode="lr-tb" style:writing-mode-automatic="false"/>
      <style:text-properties officeooo:rsid="0066cca7" officeooo:paragraph-rsid="0066cca7"/>
    </style:style>
    <style:style style:name="P14" style:family="paragraph" style:parent-style-name="Standard" style:master-page-name="">
      <loext:graphic-properties draw:fill="none"/>
      <style:paragraph-properties fo:margin-left="3in" fo:margin-right="0in" fo:hyphenation-ladder-count="no-limit" fo:hyphenation-keep="auto" loext:hyphenation-keep-type="column" loext:hyphenation-keep-line="false" fo:text-indent="-2.5in" style:auto-text-indent="false" style:page-number="auto" fo:background-color="transparent" style:writing-mode="lr-tb" style:writing-mode-automatic="false">
        <style:tab-stops>
          <style:tab-stop style:position="-0.5in"/>
        </style:tab-stops>
      </style:paragraph-properties>
      <style:text-properties officeooo:rsid="006709c8" officeooo:paragraph-rsid="006709c8" fo:hyphenate="false" loext:hyphenation-no-caps="false" loext:hyphenation-no-last-word="false" loext:hyphenation-word-char-count="no-limit" loext:hyphenation-zone="no-limit"/>
    </style:style>
    <style:style style:name="P15" style:family="paragraph" style:parent-style-name="Standard">
      <loext:graphic-properties draw:fill="none"/>
      <style:paragraph-properties fo:margin-left="3in" fo:margin-right="0in" fo:hyphenation-ladder-count="no-limit" fo:hyphenation-keep="auto" loext:hyphenation-keep-type="column" loext:hyphenation-keep-line="false" fo:text-indent="-2.5in" style:auto-text-indent="false" fo:background-color="transparent" style:writing-mode="lr-tb" style:writing-mode-automatic="false">
        <style:tab-stops>
          <style:tab-stop style:position="-0.5in"/>
        </style:tab-stops>
      </style:paragraph-properties>
      <style:text-properties officeooo:rsid="006709c8" officeooo:paragraph-rsid="006709c8" fo:hyphenate="false" loext:hyphenation-no-caps="false" loext:hyphenation-no-last-word="false" loext:hyphenation-word-char-count="no-limit" loext:hyphenation-zone="no-limit"/>
    </style:style>
    <style:style style:name="P16" style:family="paragraph" style:parent-style-name="Standard">
      <loext:graphic-properties draw:fill="none"/>
      <style:paragraph-properties fo:margin-left="3in" fo:margin-right="0in" fo:hyphenation-ladder-count="no-limit" fo:hyphenation-keep="auto" loext:hyphenation-keep-type="column" loext:hyphenation-keep-line="false" fo:text-indent="-2.5in" style:auto-text-indent="false" fo:background-color="transparent" style:writing-mode="lr-tb" style:writing-mode-automatic="false">
        <style:tab-stops>
          <style:tab-stop style:position="-0.5in"/>
        </style:tab-stops>
      </style:paragraph-properties>
      <style:text-properties officeooo:rsid="00670e02" officeooo:paragraph-rsid="00670e02" fo:hyphenate="false" loext:hyphenation-no-caps="false" loext:hyphenation-no-last-word="false" loext:hyphenation-word-char-count="no-limit" loext:hyphenation-zone="no-limit"/>
    </style:style>
    <style:style style:name="P17" style:family="paragraph" style:parent-style-name="Standard">
      <style:text-properties officeooo:rsid="00670e02" officeooo:paragraph-rsid="00670e02"/>
    </style:style>
    <style:style style:name="P18" style:family="paragraph" style:parent-style-name="Standard" style:list-style-name="L3">
      <style:paragraph-properties style:writing-mode="lr-tb" style:writing-mode-automatic="false"/>
      <style:text-properties officeooo:rsid="00670e02" officeooo:paragraph-rsid="00670e02"/>
    </style:style>
    <style:style style:name="P19" style:family="paragraph" style:parent-style-name="Standard" style:list-style-name="L3">
      <style:text-properties officeooo:rsid="00670e02" officeooo:paragraph-rsid="00670e02"/>
    </style:style>
    <style:style style:name="P20" style:family="paragraph" style:parent-style-name="Standard">
      <style:text-properties officeooo:rsid="00484b47" officeooo:paragraph-rsid="00484b47"/>
    </style:style>
    <style:style style:name="P21" style:family="paragraph" style:parent-style-name="Standard">
      <style:text-properties officeooo:rsid="0064d4f2" officeooo:paragraph-rsid="0064d4f2"/>
    </style:style>
    <style:style style:name="P22" style:family="paragraph" style:parent-style-name="Standard">
      <style:paragraph-properties style:writing-mode="lr-tb" style:writing-mode-automatic="false"/>
      <style:text-properties officeooo:rsid="0049402c" officeooo:paragraph-rsid="006532f2"/>
    </style:style>
    <style:style style:name="P23" style:family="paragraph" style:parent-style-name="Standard">
      <style:text-properties officeooo:rsid="00484b47" officeooo:paragraph-rsid="006532f2"/>
    </style:style>
    <style:style style:name="P24" style:family="paragraph" style:parent-style-name="Standard">
      <style:paragraph-properties style:writing-mode="lr-tb" style:writing-mode-automatic="false"/>
      <style:text-properties officeooo:rsid="0064d4f2" officeooo:paragraph-rsid="0064d4f2"/>
    </style:style>
    <style:style style:name="P25" style:family="paragraph" style:parent-style-name="Standard">
      <style:text-properties officeooo:rsid="006532f2" officeooo:paragraph-rsid="006532f2"/>
    </style:style>
    <style:style style:name="P26" style:family="paragraph" style:parent-style-name="Standard">
      <style:paragraph-properties style:writing-mode="lr-tb" style:writing-mode-automatic="false"/>
      <style:text-properties officeooo:rsid="00484b47" officeooo:paragraph-rsid="0049402c"/>
    </style:style>
    <style:style style:name="P27" style:family="paragraph" style:parent-style-name="Standard">
      <style:paragraph-properties style:writing-mode="lr-tb" style:writing-mode-automatic="false"/>
      <style:text-properties officeooo:rsid="006532f2" officeooo:paragraph-rsid="006532f2"/>
    </style:style>
    <style:style style:name="P28" style:family="paragraph" style:parent-style-name="Standard">
      <style:paragraph-properties fo:margin-left="0.5in" fo:text-indent="0in" style:auto-text-indent="false" style:writing-mode="lr-tb" style:writing-mode-automatic="false"/>
      <style:text-properties officeooo:rsid="0045574f" officeooo:paragraph-rsid="006532f2"/>
    </style:style>
    <style:style style:name="P29" style:family="paragraph" style:parent-style-name="Standard">
      <style:paragraph-properties fo:margin-left="0in" fo:text-indent="0in" style:auto-text-indent="false" style:writing-mode="lr-tb" style:writing-mode-automatic="false"/>
      <style:text-properties officeooo:rsid="0045574f" officeooo:paragraph-rsid="006532f2"/>
    </style:style>
    <style:style style:name="P30" style:family="paragraph" style:parent-style-name="Standard">
      <style:paragraph-properties fo:margin-left="0in" fo:text-indent="0in" style:auto-text-indent="false" style:writing-mode="lr-tb" style:writing-mode-automatic="false"/>
      <style:text-properties officeooo:rsid="006532f2" officeooo:paragraph-rsid="006532f2"/>
    </style:style>
    <style:style style:name="P31" style:family="paragraph" style:parent-style-name="Standard">
      <style:paragraph-properties style:writing-mode="lr-tb" style:writing-mode-automatic="false"/>
      <style:text-properties officeooo:rsid="0045574f" officeooo:paragraph-rsid="0045574f"/>
    </style:style>
    <style:style style:name="P32" style:family="paragraph" style:parent-style-name="Standard">
      <style:paragraph-properties style:writing-mode="lr-tb" style:writing-mode-automatic="false"/>
      <style:text-properties officeooo:rsid="0049bf79" officeooo:paragraph-rsid="0049bf79"/>
    </style:style>
    <style:style style:name="P33" style:family="paragraph" style:parent-style-name="Standard">
      <style:paragraph-properties style:writing-mode="lr-tb" style:writing-mode-automatic="false"/>
      <style:text-properties officeooo:rsid="004c09ab" officeooo:paragraph-rsid="004c09ab"/>
    </style:style>
    <style:style style:name="P34" style:family="paragraph" style:parent-style-name="Standard">
      <style:paragraph-properties style:writing-mode="lr-tb" style:writing-mode-automatic="false"/>
      <style:text-properties officeooo:rsid="0062e657" officeooo:paragraph-rsid="0062e657"/>
    </style:style>
    <style:style style:name="P35" style:family="paragraph" style:parent-style-name="Standard">
      <style:paragraph-properties style:writing-mode="lr-tb" style:writing-mode-automatic="false"/>
      <style:text-properties officeooo:rsid="005b3f3c" officeooo:paragraph-rsid="005b3f3c"/>
    </style:style>
    <style:style style:name="P36" style:family="paragraph" style:parent-style-name="Standard">
      <style:paragraph-properties style:writing-mode="lr-tb" style:writing-mode-automatic="false"/>
      <style:text-properties officeooo:rsid="00586d2d" officeooo:paragraph-rsid="005a42b3"/>
    </style:style>
    <style:style style:name="P37" style:family="paragraph" style:parent-style-name="Standard">
      <style:paragraph-properties style:writing-mode="lr-tb" style:writing-mode-automatic="false"/>
      <style:text-properties officeooo:rsid="005f9943" officeooo:paragraph-rsid="005f9943"/>
    </style:style>
    <style:style style:name="P38" style:family="paragraph" style:parent-style-name="Standard">
      <style:paragraph-properties style:writing-mode="lr-tb" style:writing-mode-automatic="false"/>
      <style:text-properties officeooo:rsid="005dc4a8" officeooo:paragraph-rsid="005dc4a8"/>
    </style:style>
    <style:style style:name="P39" style:family="paragraph" style:parent-style-name="Standard">
      <style:paragraph-properties style:writing-mode="lr-tb" style:writing-mode-automatic="false"/>
      <style:text-properties officeooo:rsid="005fd46e" officeooo:paragraph-rsid="005fd46e"/>
    </style:style>
    <style:style style:name="P40" style:family="paragraph" style:parent-style-name="Standard">
      <style:paragraph-properties style:writing-mode="lr-tb" style:writing-mode-automatic="false"/>
      <style:text-properties officeooo:rsid="005fd46e" officeooo:paragraph-rsid="0060e96d"/>
    </style:style>
    <style:style style:name="P41" style:family="paragraph" style:parent-style-name="Standard">
      <style:paragraph-properties style:writing-mode="lr-tb" style:writing-mode-automatic="false"/>
      <style:text-properties officeooo:rsid="0060e96d" officeooo:paragraph-rsid="0060e96d"/>
    </style:style>
    <style:style style:name="P42" style:family="paragraph" style:parent-style-name="Standard">
      <style:paragraph-properties style:writing-mode="lr-tb" style:writing-mode-automatic="false"/>
      <style:text-properties officeooo:rsid="005a42b3" officeooo:paragraph-rsid="005a42b3"/>
    </style:style>
    <style:style style:name="P43" style:family="paragraph" style:parent-style-name="Standard">
      <style:paragraph-properties style:writing-mode="lr-tb" style:writing-mode-automatic="false"/>
      <style:text-properties officeooo:rsid="004c09ab" officeooo:paragraph-rsid="00586d2d"/>
    </style:style>
    <style:style style:name="P44" style:family="paragraph" style:parent-style-name="Standard">
      <style:paragraph-properties style:writing-mode="lr-tb" style:writing-mode-automatic="false"/>
      <style:text-properties officeooo:rsid="00586d2d" officeooo:paragraph-rsid="00586d2d"/>
    </style:style>
    <style:style style:name="P45" style:family="paragraph" style:parent-style-name="Standard">
      <style:paragraph-properties style:writing-mode="lr-tb" style:writing-mode-automatic="false"/>
      <style:text-properties officeooo:rsid="005169c7" officeooo:paragraph-rsid="005169c7"/>
    </style:style>
    <style:style style:name="P46" style:family="paragraph" style:parent-style-name="Standard">
      <style:paragraph-properties style:writing-mode="lr-tb" style:writing-mode-automatic="false"/>
      <style:text-properties officeooo:rsid="0051e752" officeooo:paragraph-rsid="0051e752"/>
    </style:style>
    <style:style style:name="P47" style:family="paragraph" style:parent-style-name="Standard">
      <style:paragraph-properties style:writing-mode="lr-tb" style:writing-mode-automatic="false"/>
      <style:text-properties officeooo:rsid="0052f302" officeooo:paragraph-rsid="0052f302"/>
    </style:style>
    <style:style style:name="P48" style:family="paragraph" style:parent-style-name="Standard">
      <style:paragraph-properties style:writing-mode="lr-tb" style:writing-mode-automatic="false"/>
      <style:text-properties officeooo:rsid="0058586e" officeooo:paragraph-rsid="0058586e"/>
    </style:style>
    <style:style style:name="P49" style:family="paragraph" style:parent-style-name="Standard">
      <style:paragraph-properties style:writing-mode="lr-tb" style:writing-mode-automatic="false"/>
      <style:text-properties officeooo:rsid="005612f9" officeooo:paragraph-rsid="0058586e"/>
    </style:style>
    <style:style style:name="P50" style:family="paragraph" style:parent-style-name="Standard">
      <style:paragraph-properties style:writing-mode="lr-tb" style:writing-mode-automatic="false"/>
      <style:text-properties officeooo:rsid="005169c7" officeooo:paragraph-rsid="00586d2d"/>
    </style:style>
    <style:style style:name="P51" style:family="paragraph" style:parent-style-name="Standard">
      <style:paragraph-properties style:writing-mode="lr-tb" style:writing-mode-automatic="false"/>
      <style:text-properties officeooo:rsid="004ff247" officeooo:paragraph-rsid="004ff247"/>
    </style:style>
    <style:style style:name="P52" style:family="paragraph" style:parent-style-name="Standard">
      <style:paragraph-properties style:writing-mode="lr-tb" style:writing-mode-automatic="false"/>
      <style:text-properties officeooo:rsid="004c09ab" officeooo:paragraph-rsid="004ff247"/>
    </style:style>
    <style:style style:name="P53" style:family="paragraph" style:parent-style-name="Standard">
      <style:paragraph-properties style:writing-mode="lr-tb" style:writing-mode-automatic="false"/>
      <style:text-properties officeooo:rsid="004cf762" officeooo:paragraph-rsid="004cf762"/>
    </style:style>
    <style:style style:name="P54" style:family="paragraph" style:parent-style-name="Standard">
      <style:paragraph-properties style:writing-mode="lr-tb" style:writing-mode-automatic="false"/>
      <style:text-properties officeooo:rsid="004ebe16" officeooo:paragraph-rsid="004ebe16"/>
    </style:style>
    <style:style style:name="T1" style:family="text">
      <style:text-properties officeooo:rsid="006790b0"/>
    </style:style>
    <style:style style:name="T2" style:family="text">
      <style:text-properties officeooo:rsid="0069534e"/>
    </style:style>
    <style:style style:name="T3" style:family="text">
      <style:text-properties officeooo:rsid="00670e02"/>
    </style:style>
    <style:style style:name="T4" style:family="text">
      <style:text-properties officeooo:rsid="004bac90"/>
    </style:style>
    <style:style style:name="T5" style:family="text">
      <style:text-properties officeooo:rsid="006532f2"/>
    </style:style>
    <style:style style:name="T6" style:family="text">
      <style:text-properties officeooo:rsid="00586d2d"/>
    </style:style>
    <style:style style:name="T7" style:family="text">
      <style:text-properties officeooo:rsid="005a42b3"/>
    </style:style>
    <style:style style:name="T8" style:family="text">
      <style:text-properties officeooo:rsid="005d1e56"/>
    </style:style>
    <style:style style:name="T9" style:family="text">
      <style:text-properties officeooo:rsid="005dc4a8"/>
    </style:style>
    <style:style style:name="T10" style:family="text">
      <style:text-properties officeooo:rsid="005f9943"/>
    </style:style>
    <style:style style:name="T11" style:family="text">
      <style:text-properties officeooo:rsid="0060e96d"/>
    </style:style>
    <style:style style:name="T12" style:family="text">
      <style:text-properties officeooo:rsid="004ff247"/>
    </style:style>
    <style:style style:name="T13" style:family="text">
      <style:text-properties officeooo:rsid="005169c7"/>
    </style:style>
    <style:style style:name="T14" style:family="text">
      <style:text-properties officeooo:rsid="0051e752"/>
    </style:style>
    <style:style style:name="T15" style:family="text">
      <style:text-properties officeooo:rsid="0052c2dd"/>
    </style:style>
    <style:style style:name="T16" style:family="text">
      <style:text-properties officeooo:rsid="0052f302"/>
    </style:style>
    <style:style style:name="T17" style:family="text">
      <style:text-properties officeooo:rsid="005612f9"/>
    </style:style>
    <style:style style:name="T18" style:family="text">
      <style:text-properties officeooo:rsid="0054ce7e"/>
    </style:style>
    <style:style style:name="T19" style:family="text">
      <style:text-properties officeooo:rsid="005858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iriMotoTools Development Notes</text:h>
      <text:p text:style-name="P2">This page contains information related to the development of KiriMotoTools.</text:p>
      <text:p text:style-name="P2">Because of the way this project began as an ad-hoc, single-function utility, the contents are still somewhat loosely organized, but it will be cleaned up over time.</text:p>
      <text:p text:style-name="P2"/>
      <text:p text:style-name="P2"/>
      <text:h text:style-name="Heading_20_2" text:outline-level="2">Configuration <text:span text:style-name="T1">File </text:span>Settings</text:h>
      <text:p text:style-name="P3">The JSON batch configuration file offers the following elements.</text:p>
      <text:p text:style-name="P3"/>
      <text:h text:style-name="Heading_20_3" text:outline-level="3">Action:string</text:h>
      <text:p text:style-name="P3">Name of the action to take at this step.</text:p>
      <text:p text:style-name="P3"/>
      <text:h text:style-name="Heading_20_3" text:outline-level="3">Actions:ActionObject[]</text:h>
      <text:p text:style-name="P4">List of sub-actions.</text:p>
      <text:p text:style-name="P3"/>
      <text:h text:style-name="Heading_20_3" text:outline-level="3">MachineConfig:Dictionary<text:span text:style-name="T1">Object</text:span></text:h>
      <text:p text:style-name="P3">Configuration values for the machine.</text:p>
      <text:p text:style-name="P3"/>
      <text:list text:style-name="L1">
        <text:list-item>
          <text:p text:style-name="P5">BedX:float. -&gt; Overrides DeviceInfo.bedWidth.</text:p>
        </text:list-item>
        <text:list-item>
          <text:p text:style-name="P5">BedY:float. -&gt; Overrides DeviceInfo.bedDepth.</text:p>
        </text:list-item>
        <text:list-item>
          <text:p text:style-name="P5">BedZ:float. -&gt; Overrides DeviceInfo.maxHeight.</text:p>
        </text:list-item>
        <text:list-item>
          <text:p text:style-name="P6">MaxSpindle:int. -&gt; Overrides DeviceInfo.spindleMax.</text:p>
        </text:list-item>
        <text:list-item>
          <text:p text:style-name="P6">ToolChangeCodes:string[] -&gt; Overrides DeviceInfo.gcodeChange.</text:p>
        </text:list-item>
      </text:list>
      <text:p text:style-name="P7"/>
      <text:p text:style-name="P3"/>
      <text:h text:style-name="Heading_20_3" text:outline-level="3">Properties:NameValueObject[]</text:h>
      <text:p text:style-name="P4">List of properties to be applied to the current action. <text:span text:style-name="T2">Valid properties change with the action type.</text:span></text:p>
      <text:p text:style-name="P3"/>
      <text:h text:style-name="Heading_20_3" text:outline-level="3"><text:soft-page-break/>Remark:<text:span text:style-name="T1">string</text:span></text:h>
      <text:p text:style-name="P3">An individual remark.</text:p>
      <text:p text:style-name="P3"/>
      <text:h text:style-name="Heading_20_3" text:outline-level="3">Remarks:string[]</text:h>
      <text:p text:style-name="P3">An array of remark lines.</text:p>
      <text:p text:style-name="P3"/>
      <text:p text:style-name="P3"/>
      <text:h text:style-name="Heading_20_3" text:outline-level="3">Tool:string</text:h>
      <text:p text:style-name="P4">Name of the tool selected for this action.</text:p>
      <text:p text:style-name="P4"/>
      <text:p text:style-name="P4"/>
      <text:p text:style-name="P4"/>
      <text:p text:style-name="P4"/>
      <text:h text:style-name="Heading_20_2" text:outline-level="2">Machine Settings</text:h>
      <text:p text:style-name="P8">The machine settings are available at:</text:p>
      <text:list text:style-name="L2">
        <text:list-item>
          <text:p text:style-name="P9">settings.device</text:p>
        </text:list-item>
        <text:list-item>
          <text:p text:style-name="P10">settings.cdev.CAM</text:p>
        </text:list-item>
        <text:list-item>
          <text:p text:style-name="P11">settings.devices["Grbl CNC"]</text:p>
        </text:list-item>
      </text:list>
      <text:p text:style-name="P8"/>
      <text:p text:style-name="P8">... where the following schema is found.</text:p>
      <text:p text:style-name="P8"/>
      <text:p text:style-name="P8">DeviceInfo</text:p>
      <text:p text:style-name="P8">{</text:p>
      <text:p text:style-name="P12">mode:string = "CAM"</text:p>
      <text:p text:style-name="P12">internal:float ?</text:p>
      <text:p text:style-name="P13">bedHeight:float = 2.5 ?</text:p>
      <text:p text:style-name="P13">bedWidth:float = 300<text:tab/><text:tab/>//<text:tab/>Workspace width (X).</text:p>
      <text:p text:style-name="P13">bedDepth:float = 200<text:tab/><text:tab/>//<text:tab/>Workspace depth (Y).</text:p>
      <text:p text:style-name="P13">maxHeight:float = 50<text:tab/><text:tab/>//<text:tab/>Workspace height (Z).</text:p>
      <text:p text:style-name="P14"><text:soft-page-break/>originCenter:bool = false<text:tab/>//<text:tab/>Value indicating whether the tool origin is located at the CENTER (true) or the corner (false) of the workspace.</text:p>
      <text:p text:style-name="P15">spindleMax:int = 5000<text:tab/>//<text:tab/>The maximum RPM rating of the spindle.</text:p>
      <text:p text:style-name="P15">gcodePre:string[]<text:tab/>//<text:tab/>The codes sent prior to starting the job.</text:p>
      <text:p text:style-name="P15"><text:tab/>"G21 ; set units to MM (required)"</text:p>
      <text:p text:style-name="P15"><text:tab/>"G90 ; absolute position mode (required)"</text:p>
      <text:p text:style-name="P15">gcodePost:string[]<text:tab/>//<text:tab/>The codes sent at the end of the job.</text:p>
      <text:p text:style-name="P15"><text:tab/>"M30 ; program end"</text:p>
      <text:p text:style-name="P15">gcodeDwell:string[]<text:tab/>//<text:tab/>The codes sent to establish a dwell.</text:p>
      <text:p text:style-name="P15"><text:tab/>"G4 P{time} ; dwell for {time}ms"</text:p>
      <text:p text:style-name="P15">gcodeSpindle:string[]<text:tab/>//<text:tab/>The codes sent to set the spindle speed.</text:p>
      <text:p text:style-name="P15"><text:tab/>"M3 S{speed} ; spindle speed {speed} RPM."</text:p>
      <text:p text:style-name="P15">gcodeResetA:string[]<text:tab/>//<text:tab/>The codes sent to reset the machine.</text:p>
      <text:p text:style-name="P15">gcodeChange:string[]<text:tab/>//<text:tab/>The codes sent to change the tool.</text:p>
      <text:p text:style-name="P15"><text:tab/>"M6 T{tool} ; change tool to '{tool_name}.'"</text:p>
      <text:p text:style-name="P15">gcodeFExt:<text:span text:style-name="T3">string = "nc"<text:tab/>//<text:tab/>Default file extension.</text:span></text:p>
      <text:p text:style-name="P15">gcodeSpace:<text:span text:style-name="T3">bool = true<text:tab/>//<text:tab/>Token spacer.</text:span></text:p>
      <text:p text:style-name="P15">gcodeStrip:<text:span text:style-name="T3">bool = false<text:tab/>//<text:tab/>Strip comments.</text:span></text:p>
      <text:p text:style-name="P16">new:bool = false<text:tab/>//<text:tab/>?</text:p>
      <text:p text:style-name="P16">deviceName:string<text:tab/>//<text:tab/>Name of the device.</text:p>
      <text:p text:style-name="P16">imageURL:string<text:tab/>//<text:tab/>URL of the image thumbnail for this device.</text:p>
      <text:p text:style-name="P16">useLaser:bool = false<text:tab/>//<text:tab/>Value indicating whether this is a laser device.</text:p>
      <text:p text:style-name="P16">useIndexed:bool = false<text:tab/>//<text:tab/>Value indicating whether and indexed layout is being used, where the piece is moved one or more times during the cutting session.</text:p>
      <text:p text:style-name="P8">}</text:p>
      <text:p text:style-name="P8"/>
      <text:h text:style-name="Heading_20_3" text:outline-level="3">Manual Tool Change</text:h>
      <text:p text:style-name="P17">Here is one manual tool change sequence that honors many unsophisticated g-code senders.</text:p>
      <text:p text:style-name="P17"/>
      <text:list text:style-name="L3">
        <text:list-item>
          <text:p text:style-name="P18"><text:soft-page-break/>M5 ; stop the spindle.</text:p>
        </text:list-item>
        <text:list-item>
          <text:p text:style-name="P18">M0 ; program stop and wait for operator input.</text:p>
        </text:list-item>
        <text:list-item>
          <text:p text:style-name="P19">M6 T{tool} ; change tool to '{tool_name}'.</text:p>
        </text:list-item>
      </text:list>
      <text:p text:style-name="P17"/>
      <text:p text:style-name="P17"/>
      <text:p text:style-name="P20"/>
      <text:h text:style-name="Heading_20_2" text:outline-level="2">Operations Lists</text:h>
      <text:p text:style-name="P21">Operations lists contain zero or more individual definitions of operations to be carried out by the current file.</text:p>
      <text:p text:style-name="P21"/>
      <text:p text:style-name="P21">The structure is an array of operation objects and is located at:</text:p>
      <text:p text:style-name="P21">settings.process.ops[x].surfaces["{SurfaceName}"]</text:p>
      <text:p text:style-name="P21">and</text:p>
      <text:p text:style-name="P21">settings.sproc.CAM.default.ops[x].surfaces["{SurfaceName}"]</text:p>
      <text:p text:style-name="P21"/>
      <text:p text:style-name="P22">The last item on the ops list is always an empty record with type == "|". This includes the condition where no operations have yet been added. <text:span text:style-name="T4">If that item has not yet been added, add it when processing any operations.</text:span></text:p>
      <text:p text:style-name="P22"/>
      <text:p text:style-name="P23"/>
      <text:h text:style-name="Heading_20_3" text:outline-level="3">Outline Operation</text:h>
      <text:p text:style-name="P21"/>
      <text:p text:style-name="P21">An outline operation has the following schema.</text:p>
      <text:p text:style-name="P21"/>
      <text:p text:style-name="P21">OutlineOperationItem</text:p>
      <text:p text:style-name="P21">{</text:p>
      <text:p text:style-name="P21"><text:tab/>type:string = "outline"</text:p>
      <text:p text:style-name="P24"><text:tab/>tool:int<text:tab/><text:tab/>//<text:tab/>ID of the selected tool.</text:p>
      <text:p text:style-name="P24"><text:tab/>direction:string = "climb"</text:p>
      <text:p text:style-name="P24"><text:tab/>spindle:int<text:tab/>//<text:tab/>Spindle speed.</text:p>
      <text:p text:style-name="P24"><text:tab/>step:float: 0.4<text:tab/>//<text:tab/>Step over value.</text:p>
      <text:p text:style-name="P24"><text:soft-page-break/><text:tab/>steps:int</text:p>
      <text:p text:style-name="P24"><text:tab/>down:float<text:tab/>//<text:tab/>Step down value.</text:p>
      <text:p text:style-name="P24"><text:tab/>rate:int<text:tab/><text:tab/>//<text:tab/>Feed rate.</text:p>
      <text:p text:style-name="P24"><text:tab/>plunge:int<text:tab/>//<text:tab/>Plunge rate.</text:p>
      <text:p text:style-name="P24"><text:tab/>dogbones:bool<text:tab/>//<text:tab/>Whether to cut dogbone patterns at corners.</text:p>
      <text:p text:style-name="P24"><text:tab/>revbones:bool<text:tab/><text:tab/>//<text:tab/>Whether to cut revbone patterns.</text:p>
      <text:p text:style-name="P24"><text:tab/>omitthrough:bool<text:tab/>//<text:tab/>Whether to omit through holes.</text:p>
      <text:p text:style-name="P24"><text:tab/>omitvoid:bool<text:tab/><text:tab/>//<text:tab/>Whether to omit pockets.</text:p>
      <text:p text:style-name="P24"><text:tab/>outside:bool<text:tab/><text:tab/>//<text:tab/>Whether to cut outside outlines only.</text:p>
      <text:p text:style-name="P24"><text:tab/>inside:bool<text:tab/><text:tab/>//<text:tab/>Whether to cut inside outlines only.</text:p>
      <text:p text:style-name="P24"><text:tab/><text:span text:style-name="T5">wide:bool = false</text:span></text:p>
      <text:p text:style-name="P24"><text:tab/>ov_topz:<text:span text:style-name="T5">float<text:tab/><text:tab/>//<text:tab/>Top Z over cut.</text:span></text:p>
      <text:p text:style-name="P24"><text:tab/><text:span text:style-name="T5">ov_botz:float<text:tab/><text:tab/>//<text:tab/>Bottom Z over cut.</text:span></text:p>
      <text:p text:style-name="P21">}</text:p>
      <text:p text:style-name="P20"/>
      <text:p text:style-name="P20"/>
      <text:h text:style-name="Heading_20_3" text:outline-level="3">Pocket <text:span text:style-name="T5">Operation</text:span></text:h>
      <text:p text:style-name="P25">The pocket operation cuts non-through wells from the main body.</text:p>
      <text:p text:style-name="P26"/>
      <text:p text:style-name="P27">PocketOperationItem</text:p>
      <text:p text:style-name="P27">{</text:p>
      <text:p text:style-name="P28">type:<text:span text:style-name="T5">string =</text:span> <text:span text:style-name="T5">"</text:span>pocket<text:span text:style-name="T5">"</text:span></text:p>
      <text:p text:style-name="P28">direction:<text:span text:style-name="T5">string</text:span>: <text:span text:style-name="T5">"</text:span>climb<text:span text:style-name="T5">"</text:span></text:p>
      <text:p text:style-name="P28">spindle:<text:span text:style-name="T5">int = </text:span>10000</text:p>
      <text:p text:style-name="P28">tool:<text:span text:style-name="T5">int = </text:span>1780690475433</text:p>
      <text:p text:style-name="P28">step:<text:span text:style-name="T5">float = </text:span>0.25<text:tab/>//<text:tab/><text:span text:style-name="T5">Step over value.</text:span></text:p>
      <text:p text:style-name="P28">down:<text:span text:style-name="T5">float = </text:span>0.25<text:tab/>//<text:tab/><text:span text:style-name="T5">Step down value.</text:span></text:p>
      <text:p text:style-name="P28">rate:<text:span text:style-name="T5">int = </text:span>1100</text:p>
      <text:p text:style-name="P28">plunge:<text:span text:style-name="T5">int = </text:span>200</text:p>
      <text:p text:style-name="P28">expand:<text:span text:style-name="T5">float = </text:span>0</text:p>
      <text:p text:style-name="P28"><text:soft-page-break/>smooth:<text:span text:style-name="T5">float = </text:span>3</text:p>
      <text:p text:style-name="P28">refine:<text:span text:style-name="T5">float = </text:span>20</text:p>
      <text:p text:style-name="P28">follow:<text:span text:style-name="T5">float = </text:span>5</text:p>
      <text:p text:style-name="P28">contour:<text:span text:style-name="T5">bool = </text:span>false</text:p>
      <text:p text:style-name="P28">outline:<text:span text:style-name="T5">bool = </text:span>false</text:p>
      <text:p text:style-name="P28">ov_topz:<text:span text:style-name="T5">float = </text:span>0</text:p>
      <text:p text:style-name="P28">ov_botz:<text:span text:style-name="T5">float = </text:span>0</text:p>
      <text:p text:style-name="P28">tolerance:<text:span text:style-name="T5">float = </text:span>0</text:p>
      <text:p text:style-name="P28">surfaces:</text:p>
      <text:p text:style-name="P28">{</text:p>
      <text:p text:style-name="P28"><text:span text:style-name="T5">"</text:span>{SurfaceName}<text:span text:style-name="T5">"</text:span>: [ FaceIndexArray ]</text:p>
      <text:p text:style-name="P28">}</text:p>
      <text:p text:style-name="P29"/>
      <text:p text:style-name="P28">...<text:tab/><text:span text:style-name="T5">where FaceIndexArray is a list of int values representing the work[0].geo faces indices selected for this operation.</text:span></text:p>
      <text:p text:style-name="P30">}</text:p>
      <text:p text:style-name="P31"/>
      <text:h text:style-name="Heading_20_2" text:outline-level="2">Tool List</text:h>
      <text:p text:style-name="P32">The tools list is found at: settings.tools, which is an object array.</text:p>
      <text:p text:style-name="P32"/>
      <text:p text:style-name="P32">Each object has the following schema.</text:p>
      <text:p text:style-name="P32"/>
      <text:p text:style-name="P32"/>
      <text:p text:style-name="P32">ToolItem</text:p>
      <text:p text:style-name="P32">[</text:p>
      <text:p text:style-name="P32"><text:tab/>id: int</text:p>
      <text:p text:style-name="P32"><text:tab/>number: int</text:p>
      <text:p text:style-name="P32"><text:tab/>type: string</text:p>
      <text:p text:style-name="P32"><text:tab/>name: string</text:p>
      <text:p text:style-name="P32"><text:tab/>metric: bool</text:p>
      <text:p text:style-name="P32"><text:soft-page-break/><text:tab/>shaft_diam: float</text:p>
      <text:p text:style-name="P32"><text:tab/>shaft_len: float</text:p>
      <text:p text:style-name="P32"><text:tab/>flute_diam: float</text:p>
      <text:p text:style-name="P32"><text:tab/>flute_len: float</text:p>
      <text:p text:style-name="P32"><text:tab/>taper_tip: float</text:p>
      <text:p text:style-name="P32"><text:tab/>order: int</text:p>
      <text:p text:style-name="P32"><text:tab/>taper_angle: float</text:p>
      <text:p text:style-name="P32">]</text:p>
      <text:p text:style-name="P32"/>
      <text:p text:style-name="P32"/>
      <text:p text:style-name="P32"/>
      <text:p text:style-name="P33">Notes</text:p>
      <text:p text:style-name="P34">Description</text:p>
      <text:p text:style-name="P34">KiriMotoTools is a command-line tool for automating and enhancing the capabilities of Kiri:Moto.</text:p>
      <text:p text:style-name="P33"/>
      <text:p text:style-name="P33"/>
      <text:p text:style-name="P35">Introduction</text:p>
      <text:p text:style-name="P35">As one of the few open-source slicing applications that also accommodate full 3D CAM CNC operations on mesh-based designs like STL objects, Kiri:Moto does the job beautifully. <text:span text:style-name="T6">However, the more dense your mesh becomes, the more manual work is required of you to select hundreds or even thousands of faces while working in pocketing and contouring modes.</text:span></text:p>
      <text:p text:style-name="P35"/>
      <text:p text:style-name="P36"><text:span text:style-name="T7">KiriMotoTools is a </text:span>command-line application <text:span text:style-name="T7">that allows you to achieve a near-instantaneous turn-around on design changes, reducing your Kiri:Moto interaction time to just a couple of minutes instead of hours.</text:span></text:p>
      <text:p text:style-name="P36"/>
      <text:p text:style-name="P35">Auto-Pocket</text:p>
      <text:p text:style-name="P35">Pocketing is the CAM process of clearing material inside a closed boundary. <text:span text:style-name="T8">M</text:span>ost CAM systems struggle to infer clean pocket boundaries, depths, and feature intent from <text:span text:style-name="T8">shape</text:span> data, <text:span text:style-name="T8">and because of this, pocketing and contouring information usually needs to be selected manually. When this type of manual selection feature is applied to triangle-mesh surfaces, you might have already found that hundreds or </text:span><text:span text:style-name="T9">even </text:span><text:span text:style-name="T8">thousands of those facets have to be selected </text:span><text:span text:style-name="T9">manually.</text:span></text:p>
      <text:p text:style-name="P35"><text:soft-page-break/></text:p>
      <text:p text:style-name="P35">One of the key attributes of KiriMotoTools is that it has eliminated any need to perform human-supervised pocketing <text:span text:style-name="T9">on Kiri:Moto. Using the AutoPocket action, you can update your existing Kiri project file of any complexity with a single command.</text:span></text:p>
      <text:p text:style-name="P35"/>
      <text:p text:style-name="P37">Algorithm</text:p>
      <text:p text:style-name="P37">The algorithm for this procedure is fairly straightforward.</text:p>
      <text:p text:style-name="P37"><text:s/>- Assume that the bit is always perfectly vertical above the work (limits this version to 3D machines).</text:p>
      <text:p text:style-name="P37"><text:s/>- Select all faces that face at all upward.</text:p>
      <text:p text:style-name="P37"><text:s/>- Deselect all faces that are partially or completely behind any other face.</text:p>
      <text:p text:style-name="P37"><text:s/>- Deselect all faces that are equal to or above the top of the stock.</text:p>
      <text:p text:style-name="P35"/>
      <text:p text:style-name="P38">You can take a look at <text:span text:style-name="T10">Source/KiriMotoTools/KiriMotoAction.cs #KiriMotoActionItem.AutoPocket(KiriMotoActionItem item) to take a closer look.</text:span></text:p>
      <text:p text:style-name="P38"/>
      <text:p text:style-name="P39">Improved Multi-Pass Support</text:p>
      <text:p text:style-name="P39">Especially in cases of complex carving operations, it is much faster to define multiple identical pocket operations with each operation using a slightly smaller bit than the one before.</text:p>
      <text:p text:style-name="P39">Using the auto-pocket feature, multi-pass operations become easy to add to any project.</text:p>
      <text:p text:style-name="P39"/>
      <text:p text:style-name="P39">CNC Project Creation</text:p>
      <text:p text:style-name="P39">You can also now create a full project using a basic configuration file that reduces your overall Kiri:Moto steps to just a few.</text:p>
      <text:p text:style-name="P39"/>
      <text:p text:style-name="P39">Without KiriMotoTools</text:p>
      <text:p text:style-name="P39">When you maintain your project directly in Kiri:Moto, you use the following general workflow <text:span text:style-name="T11">to create the project</text:span>.</text:p>
      <text:p text:style-name="P39"><text:s/>- Create new Project.</text:p>
      <text:p text:style-name="P39"><text:s/>- Import STL file.</text:p>
      <text:p text:style-name="P39"><text:s/>- Set stock size.</text:p>
      <text:p text:style-name="P39"><text:s/>- Add pocket.</text:p>
      <text:p text:style-name="P39"><text:soft-page-break/><text:s/>- Set tool.</text:p>
      <text:p text:style-name="P39"><text:s/>- Select faces.</text:p>
      <text:p text:style-name="P39"><text:s/>- Add outline.</text:p>
      <text:p text:style-name="P39"><text:s/>- Set tool.</text:p>
      <text:p text:style-name="P39"><text:s/>- <text:span text:style-name="T11">Click Slice to review slicing.</text:span></text:p>
      <text:p text:style-name="P39"><text:s/>- <text:span text:style-name="T11">Click Animate to review activity.</text:span></text:p>
      <text:p text:style-name="P39"><text:s/>- <text:span text:style-name="T11">Click Export to generate the .NC file.</text:span></text:p>
      <text:p text:style-name="P39"/>
      <text:p text:style-name="P39">Each time you update your design file, you need to perform the following steps.</text:p>
      <text:p text:style-name="P39"><text:s/>- <text:span text:style-name="T11">Delete the STL object.</text:span></text:p>
      <text:p text:style-name="P39"><text:s/>- <text:span text:style-name="T11">Import the modified STL object.</text:span></text:p>
      <text:p text:style-name="P39"><text:s/>- <text:span text:style-name="T11">Select faces on every pocket operation.</text:span></text:p>
      <text:p text:style-name="P40"><text:s/>- <text:span text:style-name="T11">Click Slice to review slicing.</text:span></text:p>
      <text:p text:style-name="P40"><text:s/>- <text:span text:style-name="T11">Click Animate to review activity.</text:span></text:p>
      <text:p text:style-name="P40"><text:s/>- <text:span text:style-name="T11">Click Export to generate the .NC file.</text:span></text:p>
      <text:p text:style-name="P40"/>
      <text:p text:style-name="P39">With KiriMotoTools</text:p>
      <text:p text:style-name="P41">When you maintain your project with KiriMotoTools, use the following general workflow to create the project.</text:p>
      <text:p text:style-name="P41"><text:s/>- Create a small configuration file specifying the STL filename, Kiri filename, operations, and properties.</text:p>
      <text:p text:style-name="P41"><text:s/>- Run the command to create the project.</text:p>
      <text:p text:style-name="P40"><text:s/>- <text:span text:style-name="T11">Click Slice to review slicing.</text:span></text:p>
      <text:p text:style-name="P40"><text:s/>- <text:span text:style-name="T11">Click Animate to review activity.</text:span></text:p>
      <text:p text:style-name="P40"><text:s/>- <text:span text:style-name="T11">Click Export to generate the .NC file.</text:span></text:p>
      <text:p text:style-name="P40"/>
      <text:p text:style-name="P40">Each time you update your design file, perform the following steps.</text:p>
      <text:p text:style-name="P41"><text:s/>- Run the command to create the project.</text:p>
      <text:p text:style-name="P40"><text:s/>- <text:span text:style-name="T11">Click Slice to review slicing.</text:span></text:p>
      <text:p text:style-name="P40"><text:s/>- <text:span text:style-name="T11">Click Animate to review activity.</text:span></text:p>
      <text:p text:style-name="P40"><text:soft-page-break/><text:s/>- <text:span text:style-name="T11">Click Export to generate the .NC file.</text:span></text:p>
      <text:p text:style-name="P40"/>
      <text:p text:style-name="P36"/>
      <text:p text:style-name="P35">Summary</text:p>
      <text:p text:style-name="P42">Now, you can truly benefit from the 20x speed increase and availability of hundreds of free editors in different categories that freestyle mesh editing affords over traditional constraint-based modeling.</text:p>
      <text:p text:style-name="P43"/>
      <text:p text:style-name="P43"/>
      <text:p text:style-name="P43"/>
      <text:p text:style-name="P44">Background</text:p>
      <text:p text:style-name="P43"><text:span text:style-name="T12">When developing a new tangible product or version, y</text:span>ou <text:span text:style-name="T13">will </text:span>want to make iterations <text:span text:style-name="T12">as quickly as possible</text:span>, meaning up to multiple design changes per hour, with partial or complete physical <text:span text:style-name="T12">and sacrificial </text:span>prototypes <text:span text:style-name="T12">output </text:span>demonstrating the manifestation of <text:span text:style-name="T12">any</text:span> design <text:span text:style-name="T12">change</text:span>.</text:p>
      <text:p text:style-name="P45">Much of that goal has been met on the 3D printing front, where many systems now allow to you load an STL file directly into the printer's interface, where a well-known slicer takes over <text:span text:style-name="T14">behind the scenes </text:span>and feeds its output directly to the hardware. Even in a vast majority of the cases where the user still prefers to run their own slicer software before feeding the finished g-code to the printer, the near-instantaneous hand-off with minimal intermediate steps has been crucial for meeting fast-evolving design iterations around the world since 198<text:span text:style-name="T14">7</text:span>.</text:p>
      <text:p text:style-name="P46">However, the same can not be said for the larger CNC industry in general, or the CNC milling/routing industry in specific. Although the software for those machines have been evolving slowly since the 1957, their general software <text:span text:style-name="T15">philosophy and approach </text:span>have been locked in a separate track than has been taken by the 3D printing community. Although 3D printers use most of the same parts as a CNC router, including controller electronics, gantries, stepper or servo motors, and they speak in only slightly different variants of the same g-code language, <text:span text:style-name="T16">the g-code file generation for a CNC router, otherwise known as a subtractive device, is usually vastly different than the g-code file generation technique for a similarly sized 3D printer, otherwise referred to as an additive device.</text:span></text:p>
      <text:p text:style-name="P47">To be compatible with a fully 3D subtractive machine, a general software workflow pattern <text:span text:style-name="T17">typically must </text:span>be followed before the expected g-code can be produced.</text:p>
      <text:p text:style-name="P47"><text:s/>- Draw the design in a constraint-based 3D CAD system.</text:p>
      <text:p text:style-name="P47"><text:s/>- Save the design as a proprietary solid object model.</text:p>
      <text:p text:style-name="P47"><text:s/>- Process the solid object model file in a CAM editing software, where the following manual steps are taken.</text:p>
      <text:p text:style-name="P47"><text:s/>- <text:span text:style-name="T18">Clean the geometry.</text:span></text:p>
      <text:p text:style-name="P47"><text:s/>- <text:span text:style-name="T18">Surface roughing.</text:span></text:p>
      <text:p text:style-name="P47"><text:soft-page-break/><text:s/>- <text:span text:style-name="T18">Semi-finishing pass.</text:span></text:p>
      <text:p text:style-name="P47"><text:s/>- <text:span text:style-name="T18">Finishing pass.</text:span></text:p>
      <text:p text:style-name="P47"><text:s/>- <text:span text:style-name="T18">Drilling operations.</text:span></text:p>
      <text:p text:style-name="P47"><text:s/>- <text:span text:style-name="T18">Cut-out operations.</text:span></text:p>
      <text:p text:style-name="P47"><text:s/>- <text:span text:style-name="T18">Special operations.</text:span></text:p>
      <text:p text:style-name="P47"/>
      <text:p text:style-name="P48">To give CAM its due, there is a high potential for time efficiency at the machine by conducting only those operations that are actually needed, instead of crisscrossing back and forth across the stock all day long while the longest possible route is taken to eliminate all material needing to be cleared away. You might see CAM operations as a kind of vector art whereas slicing away every square inch of negative space on a layer-by-layer basis, like an opposite of a 3D print, would be much closer to bitmap art.</text:p>
      <text:p text:style-name="P48"/>
      <text:p text:style-name="P49"><text:span text:style-name="T19">But n</text:span>ot only is the above process tedious and ridiculously time-consuming, when compared to sending a file to a 3D printer, it should be noted that the only type of file that can be handled this way, in most cases, is the proprietary solid model style of design that is widely associated only with NURBS and constraint-based CAD software produced by the largest commercial producers.</text:p>
      <text:p text:style-name="P49"/>
      <text:p text:style-name="P50"><text:span text:style-name="T19">T</text:span>he freestyle mesh-based approach to 3D design <text:span text:style-name="T6">process </text:span>is up to 20 times faster than their <text:span text:style-name="T19">solid </text:span>object counterparts in constraint-based CAD drawing systems. <text:span text:style-name="T6">In hundreds of cases, you can create a perfectly accurate design using mesh tools within 10 to 15 minutes that might otherwise take you several hours on what is otherwise considered to be today's formal type of CAD editor. And thankfully, there are a few CAM systems out there that can faithfully import a high quality mesh, but that's just about where the fun ends, because as soon as you begin defining operations on the faces of that mesh, you will quickly understand that any time you might have saved on the design will be wasted on its production.</text:span></text:p>
      <text:p text:style-name="P50"/>
      <text:p text:style-name="P50"/>
      <text:p text:style-name="P50"><text:s/>, mesh suffers at the CAM stage due to </text:p>
      <text:p text:style-name="P33"/>
      <text:p text:style-name="P51">The purpose of KitiMotoTools is to drastically reduce the number of </text:p>
      <text:p text:style-name="P51"/>
      <text:p text:style-name="P35"/>
      <text:p text:style-name="P52"/>
      <text:p text:style-name="P53">Some operations like pocketing with fine detail are faster and more effective when applying the same operation multiple times with decreasing bit sizes.</text:p>
      <text:p text:style-name="P53"><text:soft-page-break/></text:p>
      <text:p text:style-name="P54">In this version, for the sake of expediency, I have assumed that your stock is 10mm larger in X and Y than your work, and exactly the same height.</text:p>
      <text:p text:style-name="P54"/>
      <text:p text:style-name="P54"/>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lef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30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30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30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3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30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title>DocumentTemplate</dc:title>
    <dc:description/>
    <dc:subject/>
    <meta:creation-date>2026-06-23T05:19:42.583153400</meta:creation-date>
    <meta:editing-cycles>27</meta:editing-cycles>
    <meta:editing-duration>PT18H38M58S</meta:editing-duration>
    <meta:initial-creator>Daniel Patterson, MCSD</meta:initial-creator>
    <dc:date>2026-06-28T14:39:09.849990300</dc:date>
    <dc:creator>Daniel Patterson, MCSD</dc:creator>
    <meta:document-statistic meta:table-count="0" meta:image-count="0" meta:object-count="0" meta:page-count="12" meta:paragraph-count="218" meta:word-count="2078" meta:character-count="13068" meta:non-whitespace-character-count="11129"/>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6-23T05:19:41.586953200"/>
  </office:meta>
</office:document-meta>
</file>