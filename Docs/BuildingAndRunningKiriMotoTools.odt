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writing-mode="lr-tb" style:writing-mode-automatic="false"/>
      <style:text-properties officeooo:rsid="00462ee9" officeooo:paragraph-rsid="00462ee9"/>
    </style:style>
    <style:style style:name="P2" style:family="paragraph" style:parent-style-name="Normal">
      <style:text-properties officeooo:paragraph-rsid="00462ee9"/>
    </style:style>
    <style:style style:name="P3" style:family="paragraph" style:parent-style-name="Normal">
      <style:text-properties officeooo:rsid="00462ee9" officeooo:paragraph-rsid="00462ee9"/>
    </style:style>
    <style:style style:name="P4" style:family="paragraph" style:parent-style-name="Normal" style:list-style-name="L1">
      <style:text-properties officeooo:rsid="005b2631" officeooo:paragraph-rsid="005b2631"/>
    </style:style>
    <style:style style:name="P5" style:family="paragraph" style:parent-style-name="Normal">
      <style:text-properties officeooo:rsid="004752e5" officeooo:paragraph-rsid="004752e5"/>
    </style:style>
    <style:style style:name="P6" style:family="paragraph" style:parent-style-name="Normal">
      <style:paragraph-properties style:writing-mode="lr-tb" style:writing-mode-automatic="false"/>
      <style:text-properties officeooo:rsid="00462ee9" officeooo:paragraph-rsid="004752e5"/>
    </style:style>
    <style:style style:name="P7" style:family="paragraph" style:parent-style-name="Normal" style:list-style-name="L2">
      <style:paragraph-properties style:writing-mode="lr-tb" style:writing-mode-automatic="false"/>
      <style:text-properties officeooo:rsid="004752e5" officeooo:paragraph-rsid="004987cb"/>
    </style:style>
    <style:style style:name="P8" style:family="paragraph" style:parent-style-name="Normal" style:list-style-name="L2">
      <style:paragraph-properties style:writing-mode="lr-tb" style:writing-mode-automatic="false"/>
      <style:text-properties officeooo:rsid="004987cb" officeooo:paragraph-rsid="004987cb"/>
    </style:style>
    <style:style style:name="P9" style:family="paragraph" style:parent-style-name="Normal">
      <style:paragraph-properties style:writing-mode="lr-tb" style:writing-mode-automatic="false"/>
      <style:text-properties officeooo:rsid="004752e5" officeooo:paragraph-rsid="004752e5"/>
    </style:style>
    <style:style style:name="P10" style:family="paragraph" style:parent-style-name="Standard">
      <style:paragraph-properties style:writing-mode="lr-tb" style:writing-mode-automatic="false"/>
      <style:text-properties officeooo:rsid="0029fe26" officeooo:paragraph-rsid="004752e5"/>
    </style:style>
    <style:style style:name="P11" style:family="paragraph" style:parent-style-name="Standard">
      <style:text-properties officeooo:rsid="0029fe26" officeooo:paragraph-rsid="004752e5"/>
    </style:style>
    <style:style style:name="P12" style:family="paragraph" style:parent-style-name="Standard">
      <style:text-properties officeooo:rsid="004e49d1" officeooo:paragraph-rsid="004e49d1"/>
    </style:style>
    <style:style style:name="P13" style:family="paragraph" style:parent-style-name="Standard">
      <style:paragraph-properties style:writing-mode="lr-tb" style:writing-mode-automatic="false"/>
      <style:text-properties officeooo:rsid="004761aa" officeooo:paragraph-rsid="004761aa"/>
    </style:style>
    <style:style style:name="P14" style:family="paragraph" style:parent-style-name="Standard">
      <style:text-properties officeooo:rsid="004761aa" officeooo:paragraph-rsid="004761aa"/>
    </style:style>
    <style:style style:name="P15" style:family="paragraph" style:parent-style-name="Standard" style:list-style-name="L3">
      <style:paragraph-properties style:writing-mode="lr-tb" style:writing-mode-automatic="false"/>
      <style:text-properties officeooo:rsid="004761aa" officeooo:paragraph-rsid="004761aa"/>
    </style:style>
    <style:style style:name="P16" style:family="paragraph" style:parent-style-name="Standard">
      <style:text-properties officeooo:rsid="00491942" officeooo:paragraph-rsid="00491942"/>
    </style:style>
    <style:style style:name="P17" style:family="paragraph" style:parent-style-name="Normal">
      <style:text-properties officeooo:rsid="004761aa" officeooo:paragraph-rsid="00491942"/>
    </style:style>
    <style:style style:name="P18" style:family="paragraph" style:parent-style-name="Standard">
      <style:paragraph-properties style:writing-mode="lr-tb" style:writing-mode-automatic="false"/>
      <style:text-properties officeooo:rsid="0029fe26" officeooo:paragraph-rsid="00491942"/>
    </style:style>
    <style:style style:name="P19" style:family="paragraph" style:parent-style-name="Standard">
      <style:text-properties officeooo:rsid="0029fe26" officeooo:paragraph-rsid="00491942"/>
    </style:style>
    <style:style style:name="P20" style:family="paragraph" style:parent-style-name="Standard">
      <style:paragraph-properties style:writing-mode="lr-tb" style:writing-mode-automatic="false"/>
      <style:text-properties officeooo:rsid="00491942" officeooo:paragraph-rsid="00491942"/>
    </style:style>
    <style:style style:name="P21" style:family="paragraph" style:parent-style-name="Standard" style:list-style-name="L4">
      <style:paragraph-properties style:writing-mode="lr-tb" style:writing-mode-automatic="false"/>
      <style:text-properties officeooo:rsid="00491942" officeooo:paragraph-rsid="00491942"/>
    </style:style>
    <style:style style:name="P22" style:family="paragraph" style:parent-style-name="Standard">
      <style:paragraph-properties style:writing-mode="lr-tb" style:writing-mode-automatic="false"/>
      <style:text-properties officeooo:rsid="004e49d1" officeooo:paragraph-rsid="004e49d1"/>
    </style:style>
    <style:style style:name="P23" style:family="paragraph" style:parent-style-name="Standard">
      <style:paragraph-properties style:writing-mode="lr-tb" style:writing-mode-automatic="false"/>
      <style:text-properties officeooo:rsid="004987cb" officeooo:paragraph-rsid="004987cb"/>
    </style:style>
    <style:style style:name="P24" style:family="paragraph" style:parent-style-name="Standard">
      <style:text-properties officeooo:rsid="004b7292" officeooo:paragraph-rsid="004987cb"/>
    </style:style>
    <style:style style:name="P25" style:family="paragraph" style:parent-style-name="Standard" style:list-style-name="L5">
      <style:paragraph-properties style:writing-mode="lr-tb" style:writing-mode-automatic="false"/>
      <style:text-properties officeooo:rsid="004b7292" officeooo:paragraph-rsid="004b7292"/>
    </style:style>
    <style:style style:name="P26" style:family="paragraph" style:parent-style-name="Standard">
      <style:paragraph-properties style:writing-mode="lr-tb" style:writing-mode-automatic="false"/>
      <style:text-properties officeooo:rsid="004b7292" officeooo:paragraph-rsid="004b7292"/>
    </style:style>
    <style:style style:name="P27" style:family="paragraph" style:parent-style-name="Standard">
      <style:paragraph-properties style:writing-mode="lr-tb" style:writing-mode-automatic="false"/>
      <style:text-properties officeooo:rsid="0029fe26" officeooo:paragraph-rsid="004e49d1"/>
    </style:style>
    <style:style style:name="P28" style:family="paragraph" style:parent-style-name="Standard">
      <style:paragraph-properties style:writing-mode="lr-tb" style:writing-mode-automatic="false"/>
      <style:text-properties officeooo:rsid="004cb117" officeooo:paragraph-rsid="004cb117"/>
    </style:style>
    <style:style style:name="P29" style:family="paragraph" style:parent-style-name="Standard" style:list-style-name="L6">
      <style:paragraph-properties style:writing-mode="lr-tb" style:writing-mode-automatic="false"/>
      <style:text-properties officeooo:rsid="004cb117" officeooo:paragraph-rsid="004cb117"/>
    </style:style>
    <style:style style:name="P30" style:family="paragraph" style:parent-style-name="Standard">
      <style:paragraph-properties style:writing-mode="lr-tb" style:writing-mode-automatic="false"/>
      <style:text-properties officeooo:rsid="0029fe26" officeooo:paragraph-rsid="004cb117"/>
    </style:style>
    <style:style style:name="P31" style:family="paragraph" style:parent-style-name="Standard" style:list-style-name="L7">
      <style:paragraph-properties style:writing-mode="lr-tb" style:writing-mode-automatic="false"/>
      <style:text-properties officeooo:rsid="004cb117" officeooo:paragraph-rsid="004cb117"/>
    </style:style>
    <style:style style:name="P32" style:family="paragraph" style:parent-style-name="Standard">
      <style:paragraph-properties style:writing-mode="lr-tb" style:writing-mode-automatic="false"/>
      <style:text-properties officeooo:rsid="004d9cc3" officeooo:paragraph-rsid="004d9cc3"/>
    </style:style>
    <style:style style:name="P33" style:family="paragraph" style:parent-style-name="Standard">
      <style:paragraph-properties style:writing-mode="lr-tb" style:writing-mode-automatic="false"/>
      <style:text-properties officeooo:rsid="0055fca1" officeooo:paragraph-rsid="0055fca1"/>
    </style:style>
    <style:style style:name="P34" style:family="paragraph" style:parent-style-name="Heading_20_2">
      <style:paragraph-properties style:writing-mode="lr-tb" style:writing-mode-automatic="false"/>
      <style:text-properties officeooo:rsid="004ed8ee" officeooo:paragraph-rsid="004ed8ee"/>
    </style:style>
    <style:style style:name="P35" style:family="paragraph" style:parent-style-name="Normal">
      <style:paragraph-properties style:writing-mode="lr-tb" style:writing-mode-automatic="false"/>
      <style:text-properties officeooo:rsid="004ed8ee" officeooo:paragraph-rsid="004ed8ee"/>
    </style:style>
    <style:style style:name="P36" style:family="paragraph" style:parent-style-name="Normal">
      <style:text-properties officeooo:rsid="00608450" officeooo:paragraph-rsid="004ed8ee"/>
    </style:style>
    <style:style style:name="P37" style:family="paragraph" style:parent-style-name="Normal">
      <style:text-properties officeooo:rsid="004ed8ee" officeooo:paragraph-rsid="004ed8ee"/>
    </style:style>
    <style:style style:name="P38" style:family="paragraph" style:parent-style-name="Normal">
      <style:text-properties officeooo:rsid="00507dc9" officeooo:paragraph-rsid="00507dc9"/>
    </style:style>
    <style:style style:name="P39" style:family="paragraph" style:parent-style-name="Standard">
      <style:paragraph-properties style:writing-mode="lr-tb" style:writing-mode-automatic="false"/>
      <style:text-properties officeooo:rsid="0029fe26" officeooo:paragraph-rsid="00507dc9"/>
    </style:style>
    <style:style style:name="P40" style:family="paragraph" style:parent-style-name="Standard">
      <style:paragraph-properties style:writing-mode="lr-tb" style:writing-mode-automatic="false"/>
      <style:text-properties officeooo:rsid="004ed8ee" officeooo:paragraph-rsid="00507dc9"/>
    </style:style>
    <style:style style:name="P41" style:family="paragraph" style:parent-style-name="Normal">
      <style:text-properties officeooo:rsid="0051b273" officeooo:paragraph-rsid="0051b273"/>
    </style:style>
    <style:style style:name="P42" style:family="paragraph" style:parent-style-name="Normal" style:list-style-name="L8">
      <style:text-properties officeooo:rsid="0051b273" officeooo:paragraph-rsid="0051b273"/>
    </style:style>
    <style:style style:name="P43" style:family="paragraph" style:parent-style-name="Normal" style:list-style-name="L8">
      <style:paragraph-properties style:writing-mode="lr-tb" style:writing-mode-automatic="false"/>
      <style:text-properties officeooo:rsid="0051b273" officeooo:paragraph-rsid="0051b273"/>
    </style:style>
    <style:style style:name="P44" style:family="paragraph" style:parent-style-name="Normal">
      <style:text-properties officeooo:rsid="0061c732" officeooo:paragraph-rsid="0061c732"/>
    </style:style>
    <style:style style:name="P45" style:family="paragraph" style:parent-style-name="Normal">
      <style:text-properties officeooo:rsid="00608450" officeooo:paragraph-rsid="00608450"/>
    </style:style>
    <style:style style:name="P46" style:family="paragraph" style:parent-style-name="Normal">
      <style:text-properties officeooo:rsid="00507dc9" officeooo:paragraph-rsid="00608450"/>
    </style:style>
    <style:style style:name="P47" style:family="paragraph" style:parent-style-name="Standard">
      <style:paragraph-properties style:writing-mode="lr-tb" style:writing-mode-automatic="false"/>
      <style:text-properties officeooo:rsid="0029fe26" officeooo:paragraph-rsid="00608450"/>
    </style:style>
    <style:style style:name="P48" style:family="paragraph" style:parent-style-name="Standard">
      <style:paragraph-properties style:writing-mode="lr-tb" style:writing-mode-automatic="false"/>
      <style:text-properties officeooo:rsid="004ed8ee" officeooo:paragraph-rsid="00608450"/>
    </style:style>
    <style:style style:name="P49" style:family="paragraph" style:parent-style-name="Normal">
      <style:text-properties officeooo:rsid="0051b273" officeooo:paragraph-rsid="00608450"/>
    </style:style>
    <style:style style:name="P50" style:family="paragraph" style:parent-style-name="Normal" style:list-style-name="L8">
      <style:text-properties officeooo:rsid="0051b273" officeooo:paragraph-rsid="00608450"/>
    </style:style>
    <style:style style:name="P51" style:family="paragraph" style:parent-style-name="Normal" style:list-style-name="L8">
      <style:paragraph-properties style:writing-mode="lr-tb" style:writing-mode-automatic="false"/>
      <style:text-properties officeooo:rsid="0051b273" officeooo:paragraph-rsid="00608450"/>
    </style:style>
    <style:style style:name="T1" style:family="text">
      <style:text-properties officeooo:rsid="005f7f3b"/>
    </style:style>
    <style:style style:name="T2" style:family="text">
      <style:text-properties officeooo:rsid="004752e5"/>
    </style:style>
    <style:style style:name="T3" style:family="text">
      <style:text-properties officeooo:rsid="004987cb"/>
    </style:style>
    <style:style style:name="T4" style:family="text">
      <style:text-properties officeooo:rsid="005c5642"/>
    </style:style>
    <style:style style:name="T5" style:family="text">
      <style:text-properties officeooo:rsid="004761aa"/>
    </style:style>
    <style:style style:name="T6" style:family="text">
      <style:text-properties officeooo:rsid="002bceba"/>
    </style:style>
    <style:style style:name="T7" style:family="text">
      <style:text-properties officeooo:rsid="0069ab12"/>
    </style:style>
    <style:style style:name="T8" style:family="text">
      <style:text-properties fo:font-weight="bold" style:font-weight-asian="bold" style:font-weight-complex="bold"/>
    </style:style>
    <style:style style:name="T9" style:family="text">
      <style:text-properties officeooo:rsid="00491942"/>
    </style:style>
    <style:style style:name="T10" style:family="text">
      <style:text-properties officeooo:rsid="004e49d1"/>
    </style:style>
    <style:style style:name="T11" style:family="text">
      <style:text-properties officeooo:rsid="004b7292"/>
    </style:style>
    <style:style style:name="T12" style:family="text">
      <style:text-properties officeooo:rsid="004cb117"/>
    </style:style>
    <style:style style:name="T13" style:family="text">
      <style:text-properties officeooo:rsid="00507dc9"/>
    </style:style>
    <style:style style:name="T14" style:family="text">
      <style:text-properties officeooo:rsid="005b2631"/>
    </style:style>
    <style:style style:name="T15" style:family="text">
      <style:text-properties officeooo:rsid="0057a658"/>
    </style:style>
    <style:style style:name="T16" style:family="text">
      <style:text-properties fo:font-weight="bold" officeooo:rsid="005f7f3b" style:font-weight-asian="bold" style:font-weight-complex="bold"/>
    </style:style>
    <style:style style:name="T17" style:family="text">
      <style:text-properties officeooo:rsid="00583368"/>
    </style:style>
    <style:style style:name="T18" style:family="text">
      <style:text-properties officeooo:rsid="00608450"/>
    </style:style>
    <style:style style:name="T19" style:family="text">
      <style:text-properties fo:font-weight="bold" officeooo:rsid="00608450"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ilding and Running <text:span text:style-name="T1">KiriMoto</text:span>Tools</text:h>
      <text:p text:style-name="P2"/>
      <text:p text:style-name="P3"><text:span text:style-name="T1">KiriMoto</text:span>Tools is a managed command-line application running on the .NET Core framework on Linux, Mac, and Windows.</text:p>
      <text:p text:style-name="P3"/>
      <text:h text:style-name="Heading_20_2" text:outline-level="2">Table of Contents</text:h>
      <text:list text:style-name="L1">
        <text:list-item>
          <text:p text:style-name="P4"><text:a xlink:type="simple" xlink:href="#1.2.Prerequisites|outline" text:style-name="Internet_20_link" text:visited-style-name="Visited_20_Internet_20_Link">Prerequisites</text:a>.</text:p>
          <text:list>
            <text:list-item>
              <text:p text:style-name="P4"><text:a xlink:type="simple" xlink:href="#1.2.1.Install on Ubuntu|outline" text:style-name="Internet_20_link" text:visited-style-name="Visited_20_Internet_20_Link">Install on Ubuntu</text:a>.</text:p>
            </text:list-item>
            <text:list-item>
              <text:p text:style-name="P4"><text:a xlink:type="simple" xlink:href="#1.2.2.Install on macOS|outline" text:style-name="Internet_20_link" text:visited-style-name="Visited_20_Internet_20_Link">Install on macOS</text:a>.</text:p>
            </text:list-item>
            <text:list-item>
              <text:p text:style-name="P4"><text:a xlink:type="simple" xlink:href="#1.2.3.Install on Windows|outline" text:style-name="Internet_20_link" text:visited-style-name="Visited_20_Internet_20_Link">Install on Windows</text:a>.</text:p>
            </text:list-item>
            <text:list-item>
              <text:p text:style-name="P4"><text:a xlink:type="simple" xlink:href="#1.2.4.Verify your .NET SDK|outline" text:style-name="Internet_20_link" text:visited-style-name="Visited_20_Internet_20_Link">Verify your .NET SDK</text:a>.</text:p>
            </text:list-item>
          </text:list>
        </text:list-item>
        <text:list-item>
          <text:p text:style-name="P4"><text:a xlink:type="simple" xlink:href="#1.3.Basic Run Only Mode|outline" text:style-name="Internet_20_link" text:visited-style-name="Visited_20_Internet_20_Link">Basic Run Only Mode</text:a>.</text:p>
        </text:list-item>
        <text:list-item>
          <text:p text:style-name="P4"><text:a xlink:type="simple" xlink:href="#1.4.Publishing and Running the Compiled Version|outline" text:style-name="Internet_20_link" text:visited-style-name="Visited_20_Internet_20_Link">Publishing and Running the Compiled Version</text:a>.</text:p>
        </text:list-item>
      </text:list>
      <text:p text:style-name="P3"/>
      <text:p text:style-name="P5">{Line}</text:p>
      <text:h text:style-name="Heading_20_2" text:outline-level="2">Prerequisites</text:h>
      <text:p text:style-name="P6">The only major consideration that needs to be made is that you have <text:span text:style-name="T2">the </text:span>.NET Code SDK, <text:span text:style-name="T2">version 8 or later installed on your system. Multiple methods are available for achieving this.</text:span></text:p>
      <text:p text:style-name="P6"/>
      <text:list text:style-name="L2">
        <text:list-item>
          <text:p text:style-name="P7">Install the .NET Core SDK directly. Available on Linux, Mac, and Windows.</text:p>
        </text:list-item>
        <text:list-item>
          <text:p text:style-name="P8">Install VS Code and the accompanying C# Dev Kit extension, then run the VS Code Walkthrough, selecting the .NET Core version 10 or later SDK when prompted. Available on Linux, Mac, and Windows. This will not be covered.</text:p>
        </text:list-item>
        <text:list-item>
          <text:p text:style-name="P7">Install Visual Studio, Community or Professional editions, version 2022 or later, then select .NET Core <text:span text:style-name="T3">10</text:span> or later as an active SDK. <text:span text:style-name="T3">Available on </text:span>Windows-only. This will not be covered.</text:p>
        </text:list-item>
      </text:list>
      <text:p text:style-name="P9"/>
      <text:p text:style-name="P9"/>
      <text:p text:style-name="P9">{Line}</text:p>
      <text:h text:style-name="Heading_20_3" text:outline-level="3">Install .<text:span text:style-name="T4">NET SDK </text:span>on Ubuntu</text:h>
      <text:p text:style-name="P9">Use the following command to install .NET <text:span text:style-name="T5">10</text:span> SDK on Ubuntu. This only needs to be done once per PC.</text:p>
      <text:p text:style-name="P5"><text:soft-page-break/></text:p>
      <text:p text:style-name="P10">{CodeBlock,ba<text:span text:style-name="T6">tch</text:span>,../<text:span text:style-name="T7">Docs/</text:span><text:span text:style-name="T2">InstallNETSDK10-Ubuntu</text:span>.<text:span text:style-name="T6">txt</text:span>}</text:p>
      <text:p text:style-name="P11"/>
      <text:p text:style-name="P12">{Line}</text:p>
      <text:h text:style-name="Heading_20_3" text:outline-level="3">Install .<text:span text:style-name="T4">NET SDK </text:span>on macOS</text:h>
      <text:p text:style-name="P13">There are three methods you can use for installing the .NET SDK on Macintosh. This only needs to be done once per PC.</text:p>
      <text:p text:style-name="P14"/>
      <text:p text:style-name="P14">{Line}</text:p>
      <text:h text:style-name="Heading_20_4" text:outline-level="4">Method 1. The Graphical Installer</text:h>
      <text:list text:style-name="L3">
        <text:list-item>
          <text:p text:style-name="P15">Navigate to the official Microsoft .NET 10 Download Page at https://dotnet.microsoft.com/en-us/download/dotnet/10.0.</text:p>
        </text:list-item>
        <text:list-item>
          <text:p text:style-name="P15">Under the <text:span text:style-name="T8">SDK</text:span> section, locate the <text:span text:style-name="T8">macOS</text:span> row.</text:p>
        </text:list-item>
        <text:list-item>
          <text:p text:style-name="P15">Choose the appropriate <text:span text:style-name="T8">Installers</text:span> package based on your Mac's processor:</text:p>
          <text:list>
            <text:list-item>
              <text:p text:style-name="P15"><text:span text:style-name="T8">Arm64</text:span>. Click this if you have an Apple Silicon Mac (M1, M2, M3, M4 chips).</text:p>
            </text:list-item>
            <text:list-item>
              <text:p text:style-name="P15"><text:span text:style-name="T8">x64</text:span>. Click this if you have an older Intel-based Mac.</text:p>
            </text:list-item>
          </text:list>
        </text:list-item>
        <text:list-item>
          <text:p text:style-name="P15">Open the downloaded .pkg file from your Downloads folder.</text:p>
        </text:list-item>
        <text:list-item>
          <text:p text:style-name="P15">Follow the on-screen installation steps and provide your administrator password when prompted.</text:p>
        </text:list-item>
      </text:list>
      <text:p text:style-name="P14"/>
      <text:p text:style-name="P16">{Line}</text:p>
      <text:h text:style-name="Heading_20_4" text:outline-level="4">Method 2. MacPorts Package Manager</text:h>
      <text:p text:style-name="P16">If you use the MacPorts package manager, open your Terminal and issue the following command.</text:p>
      <text:p text:style-name="P17"/>
      <text:p text:style-name="P18">{CodeBlock,ba<text:span text:style-name="T6">tch</text:span>,../<text:span text:style-name="T7">Docs/</text:span><text:span text:style-name="T2">InstallNETSDK10-</text:span><text:span text:style-name="T9">MacPorts</text:span>.<text:span text:style-name="T6">txt</text:span>}</text:p>
      <text:p text:style-name="P19"/>
      <text:p text:style-name="P16"/>
      <text:p text:style-name="P16">{Line}</text:p>
      <text:h text:style-name="Heading_20_4" text:outline-level="4"><text:soft-page-break/>Method 3. Direct Installation</text:h>
      <text:p text:style-name="P18">You can install the SDK directly through the terminal without elevated administrative privileges using Microsoft's installation script <text:span text:style-name="T9">by following these steps.</text:span></text:p>
      <text:p text:style-name="P20"/>
      <text:list text:style-name="L4">
        <text:list-item>
          <text:p text:style-name="P21">Open your Terminal and download the Script.</text:p>
        </text:list-item>
        <text:list-item>
          <text:p text:style-name="P21">Make the script executable.</text:p>
        </text:list-item>
        <text:list-item>
          <text:p text:style-name="P21">Run the script targeting the .NET 10 channel.</text:p>
        </text:list-item>
      </text:list>
      <text:p text:style-name="P18"/>
      <text:p text:style-name="P20">The following commands carry out that process.</text:p>
      <text:p text:style-name="P20"/>
      <text:p text:style-name="P18">{CodeBlock,ba<text:span text:style-name="T6">tch</text:span>,../<text:span text:style-name="T7">Docs/</text:span><text:span text:style-name="T2">InstallNETSDK10-</text:span><text:span text:style-name="T9">MacDirect</text:span>.<text:span text:style-name="T6">txt</text:span>}</text:p>
      <text:p text:style-name="P18"/>
      <text:p text:style-name="P22">{Line}</text:p>
      <text:h text:style-name="Heading_20_3" text:outline-level="3">Instal<text:span text:style-name="T10">l</text:span> .<text:span text:style-name="T4">NET SDK </text:span>on Windows</text:h>
      <text:p text:style-name="P23">If you have Windows 10, Windows Server 2012, or newer, you can install .NET 10 SDK <text:span text:style-name="T11">by </text:span>following <text:span text:style-name="T11">these steps</text:span>. This only needs to be done once per PC.</text:p>
      <text:p text:style-name="P24"/>
      <text:list text:style-name="L5">
        <text:list-item>
          <text:p text:style-name="P25">Navigate to the official .NET 10 Download Page at <text:span text:style-name="T5">https://dotnet.microsoft.com/en-us/download/dotnet/10.0</text:span>.</text:p>
        </text:list-item>
        <text:list-item>
          <text:p text:style-name="P25">In the <text:span text:style-name="T8">SDK</text:span> section, select the appropriate <text:span text:style-name="T8">Windows</text:span> link from the <text:span text:style-name="T8">Installers</text:span> column, matching your system's architecture (usually x64 for standard 64-bit Intel/AMD processors).</text:p>
        </text:list-item>
        <text:list-item>
          <text:p text:style-name="P25">Open your <text:span text:style-name="T8">Downloads</text:span> folder and double-click the downloaded .exe installer file.</text:p>
        </text:list-item>
        <text:list-item>
          <text:p text:style-name="P25">Click the <text:span text:style-name="T8">Install</text:span> button in the setup wizard then approve the administrative (UAC) prompt.</text:p>
        </text:list-item>
        <text:list-item>
          <text:p text:style-name="P25">Close the installer window once the setup success screen appears.</text:p>
        </text:list-item>
      </text:list>
      <text:p text:style-name="P26"/>
      <text:p text:style-name="P22">{Line}</text:p>
      <text:h text:style-name="Heading_20_3" text:outline-level="3">Verify your .NET SDK</text:h>
      <text:p text:style-name="P22">To verify that your .NET SDK is up-to-date, use the following commands.</text:p>
      <text:p text:style-name="P22"/>
      <text:p text:style-name="P22"><text:soft-page-break/>If you have just finished installing the SDK, close your current Terminal session and open a new one.</text:p>
      <text:p text:style-name="P22"/>
      <text:p text:style-name="P22">To get a basic indication that the .NET Core SDK is installed, run the following command.</text:p>
      <text:p text:style-name="P27">{CodeBlock,ba<text:span text:style-name="T6">tch</text:span>,../<text:span text:style-name="T7">Docs/</text:span><text:span text:style-name="T10">DotNetVersion</text:span>.<text:span text:style-name="T6">txt</text:span>}</text:p>
      <text:p text:style-name="P27"/>
      <text:p text:style-name="P22">If the .NET SDK is installed, a version number will be output.</text:p>
      <text:p text:style-name="P22"/>
      <text:p text:style-name="P22">To get more detailed information about the platform, use the following command.</text:p>
      <text:p text:style-name="P27">{CodeBlock,ba<text:span text:style-name="T6">tch</text:span>,../<text:span text:style-name="T7">Docs/</text:span><text:span text:style-name="T10">DotNetInfo</text:span>.<text:span text:style-name="T6">txt</text:span>}</text:p>
      <text:p text:style-name="P27"/>
      <text:p text:style-name="P22"/>
      <text:p text:style-name="P26"/>
      <text:p text:style-name="P22">{Line}</text:p>
      <text:h text:style-name="Heading_20_2" text:outline-level="2"><text:span text:style-name="T12">Basic </text:span>Run Only Mode</text:h>
      <text:p text:style-name="P28">If you only want to immediately download and run the application for testing or occasional use, you can use these steps on Linux, Mac, or Windows.</text:p>
      <text:p text:style-name="P28"/>
      <text:list text:style-name="L6">
        <text:list-item>
          <text:p text:style-name="P29">Open your Terminal application.</text:p>
        </text:list-item>
        <text:list-item>
          <text:p text:style-name="P29">Change the directory to something where new temporary files won't clutter your file system, as in the following example for Ubuntu or Windows, for example.</text:p>
        </text:list-item>
      </text:list>
      <text:p text:style-name="P28"/>
      <text:p text:style-name="P30">{CodeBlock,ba<text:span text:style-name="T6">tch</text:span>,../<text:span text:style-name="T7">Docs/UsageExample-PreviousUbuntuWindows.txt</text:span>}</text:p>
      <text:p text:style-name="P30"/>
      <text:list text:style-name="L7">
        <text:list-item>
          <text:p text:style-name="P31">Download the source code from GitHub then run the application using the dotnet run command as shown in the following command-lines.</text:p>
        </text:list-item>
      </text:list>
      <text:p text:style-name="P28"/>
      <text:p text:style-name="P30">{CodeBlock,ba<text:span text:style-name="T6">tch</text:span>,../<text:span text:style-name="T7">Docs/UsageExample01.txt</text:span>}</text:p>
      <text:p text:style-name="P30"/>
      <text:p text:style-name="P28">The above example is the same as running the fully compiled version with the parameters of <text:span text:style-name="T8">/?</text:span> and <text:span text:style-name="T8">/wait</text:span>., where <text:span text:style-name="T8">/?</text:span> displays the application syntax and <text:span text:style-name="T8">/wait</text:span> waits for the user to press [Enter] before exiting the application.</text:p>
      <text:p text:style-name="P28"><text:soft-page-break/></text:p>
      <text:p text:style-name="P32">The first time you run the application, there will be some delay because it will be compiled from scratch using the source files. Each additional time you run it without changing the source files, however, it will start significantly faster than the first time.</text:p>
      <text:p text:style-name="P32"/>
      <text:p text:style-name="P33">{Line}</text:p>
      <text:h text:style-name="P34" text:outline-level="2"><text:span text:style-name="T13">Publishing and Running</text:span> the Compiled Version</text:h>
      <text:p text:style-name="P35">If you intend to use <text:span text:style-name="T1">KiriMoto</text:span>Tools multiple times, you can compile it for use in release mode and run the compiled file directly <text:span text:style-name="T14">using</text:span> the dotnet command, as shown in the example commands below.</text:p>
      <text:p text:style-name="P35"/>
      <text:h text:style-name="Heading_20_3" text:outline-level="3">Ubuntu</text:h>
      <text:p text:style-name="P36">Follow these steps to prepare the binary runtime version to run on Ubuntu.</text:p>
      <text:p text:style-name="P37"/>
      <text:p text:style-name="P38">{Line}</text:p>
      <text:p text:style-name="P39">{CodeBlock,ba<text:span text:style-name="T6">tch</text:span>,../<text:span text:style-name="T7">Docs/UsageExample0</text:span><text:span text:style-name="T13">2-Ubuntu</text:span><text:span text:style-name="T7">.txt</text:span>}</text:p>
      <text:p text:style-name="P40"/>
      <text:p text:style-name="P41">{Line}</text:p>
      <text:p text:style-name="P41">In the above example for Ubuntu, the following actions are used.</text:p>
      <text:p text:style-name="P41"/>
      <text:list xml:id="list3013115349" text:style-name="L8">
        <text:list-item>
          <text:p text:style-name="P42">Change to a directory where clutter can be managed.</text:p>
        </text:list-item>
        <text:list-item>
          <text:p text:style-name="P42">Clone the source code <text:span text:style-name="T15">from</text:span> GitHub.</text:p>
        </text:list-item>
        <text:list-item>
          <text:p text:style-name="P42">Change directories to the one containing the <text:span text:style-name="T1">KiriMoto</text:span>Tools.csproj file.</text:p>
        </text:list-item>
        <text:list-item>
          <text:p text:style-name="P42">Execute the publish command, which creates a natively executable version of <text:span text:style-name="T1">KiriMoto</text:span>Tools for Linux.</text:p>
        </text:list-item>
        <text:list-item>
          <text:p text:style-name="P43">Change to the directory where the compiled native application has been output. In this case, <text:span text:style-name="T8">~/Downloads/</text:span><text:span text:style-name="T16">KiriMoto</text:span><text:span text:style-name="T8">Tools/Source/</text:span><text:span text:style-name="T16">KiriMoto</text:span><text:span text:style-name="T8">Tools/bin/Release/net8.0/linux-x64/native</text:span></text:p>
        </text:list-item>
        <text:list-item>
          <text:p text:style-name="P42">Test-run the application, using the current relative directory prefix. <text:span text:style-name="T8">./</text:span><text:span text:style-name="T16">KiriMoto</text:span><text:span text:style-name="T8">Tools</text:span></text:p>
        </text:list-item>
      </text:list>
      <text:p text:style-name="P41"/>
      <text:p text:style-name="P41">{Line}</text:p>
      <text:p text:style-name="P41">Note that the native application file can now <text:span text:style-name="T17">either </text:span>be moved to another directory, or the current directory can be added to your global $PATH environment variable.</text:p>
      <text:p text:style-name="P41"><text:soft-page-break/></text:p>
      <text:p text:style-name="P44">{Line}</text:p>
      <text:h text:style-name="Heading_20_3" text:outline-level="3">Windows</text:h>
      <text:p text:style-name="P45">The binary application version can be prepared for Windows using the following series of commands.</text:p>
      <text:p text:style-name="P45"/>
      <text:p text:style-name="P46">{Line}</text:p>
      <text:p text:style-name="P47">{CodeBlock,ba<text:span text:style-name="T6">tch</text:span>,../<text:span text:style-name="T7">Docs/UsageExample0</text:span><text:span text:style-name="T18">3</text:span><text:span text:style-name="T13">-</text:span><text:span text:style-name="T18">Windows</text:span><text:span text:style-name="T7">.txt</text:span>}</text:p>
      <text:p text:style-name="P48"/>
      <text:p text:style-name="P49">{Line}</text:p>
      <text:p text:style-name="P49">In the above example for Ubuntu, the following actions are used.</text:p>
      <text:p text:style-name="P49"/>
      <text:list text:continue-numbering="true" text:style-name="L8">
        <text:list-item>
          <text:p text:style-name="P50">Change to a directory where clutter can be managed.</text:p>
        </text:list-item>
        <text:list-item>
          <text:p text:style-name="P50">Clone the source code <text:span text:style-name="T15">from</text:span> GitHub.</text:p>
        </text:list-item>
        <text:list-item>
          <text:p text:style-name="P50">Change directories to the one containing the <text:span text:style-name="T1">KiriMoto</text:span>Tools.csproj file.</text:p>
        </text:list-item>
        <text:list-item>
          <text:p text:style-name="P50">Execute the publish command, which creates a natively executable version of <text:span text:style-name="T1">KiriMoto</text:span>Tools for <text:span text:style-name="T18">Windows 64-bit system</text:span>.</text:p>
        </text:list-item>
        <text:list-item>
          <text:p text:style-name="P51">Change to the directory where the compiled native application has been output. In this case, <text:span text:style-name="T8">%</text:span><text:span text:style-name="T19">USERPROFILE%</text:span><text:span text:style-name="T8">/Downloads/</text:span><text:span text:style-name="T16">KiriMoto</text:span><text:span text:style-name="T8">Tools/Source/</text:span><text:span text:style-name="T16">KiriMoto</text:span><text:span text:style-name="T8">Tools/bin/Release/net8.0/</text:span><text:span text:style-name="T19">win</text:span><text:span text:style-name="T8">-x64/</text:span><text:span text:style-name="T19">publish</text:span></text:p>
        </text:list-item>
        <text:list-item>
          <text:p text:style-name="P50">Test-run the application, using the <text:span text:style-name="T18">executable name without the .exe extension</text:span>. <text:span text:style-name="T16">KiriMoto</text:span><text:span text:style-name="T8">Tools</text:span></text:p>
        </text:list-item>
      </text:list>
      <text:p text:style-name="P49"/>
      <text:p text:style-name="P49">{Line}</text:p>
      <text:p text:style-name="P49">Note that the native application file can now <text:span text:style-name="T17">either </text:span>be moved to another directory, or the current directory can be added to your global %PATH% environment variable.</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color="#0f4761" loext:opacity="100%" fo:font-size="11pt" fo:font-style="normal" fo:font-weight="300"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12T04:19:57.720466500</meta:creation-date>
    <meta:editing-cycles>27</meta:editing-cycles>
    <meta:editing-duration>PT3H25M50S</meta:editing-duration>
    <meta:initial-creator>Daniel Patterson, MCSD</meta:initial-creator>
    <dc:date>2026-06-25T05:39:46.935196500</dc:date>
    <dc:creator>Daniel Patterson, MCSD</dc:creator>
    <meta:document-statistic meta:table-count="0" meta:image-count="0" meta:object-count="0" meta:page-count="6" meta:paragraph-count="103" meta:word-count="1048" meta:character-count="6900" meta:non-whitespace-character-count="599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12T04:19:57.467869900"/>
  </office:meta>
</office:document-meta>
</file>